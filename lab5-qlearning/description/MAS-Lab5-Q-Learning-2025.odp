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Sans" svg:font-family="'Fira Sans'" style:font-adornments="Regular" style:font-family-generic="swiss" style:font-pitch="variable"/>
    <style:font-face style:name="Fira Sans Light" svg:font-family="'Fira Sans Light'" style:font-family-generic="swiss"/>
    <style:font-face style:name="Fira Sans Light1" svg:font-family="'Fira Sans Light'" style:font-adornments="Regular" style:font-family-generic="swiss"/>
    <style:font-face style:name="Fira Sans1" svg:font-family="'Fira Sans'" style:font-adornments="ExtraLight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file_3a__2f__2f__2f_home_2f_sb17498_2f_.config_2f_libreoffice_2f_4_2f_user_2f_template_2f_MetropolisTemplate.otp-subtitle">
      <style:graphic-properties draw:fill-color="#ffffff" draw:auto-grow-height="true" fo:min-height="9.134cm" loext:decorative="false"/>
      <style:paragraph-properties style:writing-mode="lr-tb"/>
    </style:style>
    <style:style style:name="pr2" style:family="presentation" style:parent-style-name="file_3a__2f__2f__2f_home_2f_sb17498_2f_.config_2f_libreoffice_2f_4_2f_user_2f_template_2f_MetropolisTemplate.otp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file_3a__2f__2f__2f_home_2f_sb17498_2f_.config_2f_libreoffice_2f_4_2f_user_2f_template_2f_MetropolisTemplate.otp-title">
      <style:graphic-properties draw:auto-grow-height="true" fo:min-height="1.922cm" loext:decorative="false"/>
      <style:paragraph-properties style:writing-mode="lr-tb"/>
    </style:style>
    <style:style style:name="pr4" style:family="presentation" style:parent-style-name="file_3a__2f__2f__2f_home_2f_sb17498_2f_.config_2f_libreoffice_2f_4_2f_user_2f_template_2f_MetropolisTemplate.otp-outline1">
      <style:graphic-properties fo:min-height="11.929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19.5pt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1cm"/>
    </style:style>
    <style:style style:name="P7" style:family="paragraph">
      <style:paragraph-properties fo:text-align="justify"/>
    </style:style>
    <style:style style:name="P8" style:family="paragraph">
      <style:paragraph-properties fo:margin-top="0cm" fo:margin-bottom="0.1cm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margin-left="0cm" fo:margin-right="0cm" fo:margin-top="0cm" fo:margin-bottom="0.1cm" fo:text-indent="0cm"/>
    </style:style>
    <style:style style:name="P11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19.5pt" fo:font-weight="bold" style:font-weight-asian="bold" style:font-weight-complex="bold"/>
    </style:style>
    <style:style style:name="T2" style:family="text">
      <style:text-properties fo:font-size="19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5pt" style:font-size-asian="16pt" style:font-size-complex="16pt"/>
    </style:style>
    <style:style style:name="T8" style:family="text">
      <style:text-properties fo:font-size="15pt" fo:font-weight="bold" style:font-size-asian="16pt" style:font-weight-asian="bold" style:font-size-complex="16pt" style:font-weight-complex="bold"/>
    </style:style>
    <style:style style:name="T9" style:family="text">
      <style:text-properties fo:font-size="15pt" fo:font-weight="normal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fo:color="#003333" loext:opacity="100%" style:text-outline="false" style:text-line-through-style="none" style:text-line-through-type="none" fo:font-size="15pt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3333" loext:opacity="100%" style:text-outline="false" style:text-line-through-style="none" style:text-line-through-type="none" style:font-name="Fira Sans Light" fo:font-size="15pt" fo:font-style="normal" fo:text-shadow="none" style:text-underline-style="none" fo:font-weight="normal" style:letter-kerning="true" style:font-name-asian="Fira Sans Light" style:font-size-asian="16pt" style:font-style-asian="normal" style:font-weight-asian="normal" style:font-name-complex="Fira Sans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" style:font-size-asian="16pt" style:font-style-asian="normal" style:font-weight-asian="normal" style:font-name-complex="Fira Sans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15pt" fo:text-shadow="none" style:text-underline-style="none" fo:font-weight="bold" style:letter-kerning="true" style:font-name-asian="Fira Sans Light" style:font-size-asian="16pt" style:font-weight-asian="bold" style:font-name-complex="Fira Sans Light" style:font-size-complex="16pt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Fira Sans Light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15" style:family="text">
      <style:text-properties style:font-name="Fira Sans Light1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16" style:family="text">
      <style:text-properties style:font-name="Fira Sans Light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17" style:family="text">
      <style:text-properties style:font-name="Fira Sans Light" fo:font-size="15pt" fo:font-style="normal" fo:font-weight="bold" style:font-name-asian="Fira Sans Light" style:font-size-asian="16pt" style:font-style-asian="normal" style:font-weight-asian="bold" style:font-name-complex="Fira Sans Light" style:font-size-complex="16pt" style:font-style-complex="normal" style:font-weight-complex="bold"/>
    </style:style>
    <style:style style:name="T18" style:family="text">
      <style:text-properties fo:font-variant="normal" fo:text-transform="none" fo:color="#003333" loext:opacity="100%" style:text-outline="false" style:text-line-through-style="none" style:text-line-through-type="none" fo:font-size="16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3333" loext:opacity="100%" style:text-outline="false" style:text-line-through-style="none" style:text-line-through-type="none" style:font-name="Fira Sans Light" fo:font-size="16pt" fo:font-style="normal" fo:text-shadow="none" style:text-underline-style="none" fo:font-weight="bold" style:letter-kerning="true" style:font-name-asian="Fira Sans Light" style:font-size-asian="18pt" style:font-style-asian="normal" style:font-weight-asian="bold" style:font-name-complex="Fira Sans Light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16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6pt" fo:font-weight="bold" style:font-size-asian="18pt" style:font-weight-asian="bold" style:font-size-complex="18pt" style:font-weight-complex="bold"/>
    </style:style>
    <style:style style:name="T22" style:family="text">
      <style:text-properties fo:font-size="16pt" fo:font-weight="normal" style:font-size-asian="18pt" style:font-weight-asian="normal" style:font-size-complex="18pt" style:font-weight-complex="normal"/>
    </style:style>
    <style:style style:name="T23" style:family="text">
      <style:text-properties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4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16pt" fo:text-shadow="none" style:text-underline-style="none" fo:font-weight="bold" style:letter-kerning="true" style:font-name-asian="WenQuanYi Zen Hei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15pt" fo:font-style="normal" fo:text-shadow="none" style:text-underline-style="none" fo:font-weight="bold" style:letter-kerning="true" style:font-name-asian="Fira Sans Light" style:font-size-asian="16pt" style:font-style-asian="normal" style:font-weight-asian="bold" style:font-name-complex="Fira Sans Light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30" style:family="text">
      <style:text-properties style:font-name="Fira Sans Light1" fo:font-size="15pt" fo:font-style="italic" fo:font-weight="bold" style:font-name-asian="Fira Sans Light" style:font-size-asian="16pt" style:font-style-asian="italic" style:font-weight-asian="bold" style:font-name-complex="Fira Sans Light" style:font-size-complex="16pt" style:font-style-complex="italic" style:font-weight-complex="bold"/>
    </style:style>
    <style:style style:name="T31" style:family="text">
      <style:text-properties style:text-position="-33% 58%"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32" style:family="text">
      <style:text-properties style:text-position="-33% 58%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3" style:family="text">
      <style:text-properties fo:color="#006699" loext:opacity="100%" fo:font-size="15pt" style:font-size-asian="16pt" style:font-size-complex="16pt"/>
    </style:style>
    <style:style style:name="T34" style:family="text">
      <style:text-properties fo:color="#006699" loext:opacity="100%" fo:font-size="16pt" fo:font-weight="bold" style:font-size-asian="18pt" style:font-weight-asian="bold" style:font-size-complex="18pt" style:font-weight-complex="bold"/>
    </style:style>
    <style:style style:name="T35" style:family="text">
      <style:text-properties fo:color="#006699" loext:opacity="100%" fo:font-size="16pt" fo:font-weight="normal" style:font-size-asian="18pt" style:font-weight-asian="normal" style:font-size-complex="18pt" style:font-weight-complex="normal"/>
    </style:style>
    <style:style style:name="T36" style:family="text">
      <style:text-properties fo:font-variant="normal" fo:text-transform="none" fo:color="#006699" loext:opacity="100%" style:text-outline="false" style:text-line-through-style="none" style:text-line-through-type="none" style:font-name="Fira Sans Light1" fo:font-size="16pt" fo:text-shadow="none" style:text-underline-style="none" fo:font-weight="bold" style:letter-kerning="true" style:font-name-asian="WenQuanYi Zen Hei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99" loext:opacity="100%" style:text-outline="false" style:text-line-through-style="none" style:text-line-through-type="none" style:font-name="Fira Sans Light1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699" loext:opacity="100%" style:text-outline="false" style:text-line-through-style="none" style:text-line-through-type="none" style:font-name="Fira Sans Light1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6699" loext:opacity="100%" style:font-name="Fira Sans Light1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40" style:family="text">
      <style:text-properties fo:color="#006699" loext:opacity="100%"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41" style:family="text">
      <style:text-properties fo:color="#006699" loext:opacity="100%" fo:font-size="15pt" fo:font-weight="bold" style:font-size-asian="16pt" style:font-weight-asian="bold" style:font-size-complex="16pt" style:font-weight-complex="bold"/>
    </style:style>
    <style:style style:name="T42" style:family="text">
      <style:text-properties fo:color="#006699" loext:opacity="100%" style:font-name="Fira Sans Light1" fo:font-size="15pt" fo:font-style="italic" fo:font-weight="bold" style:font-name-asian="Fira Sans Light" style:font-size-asian="16pt" style:font-style-asian="italic" style:font-weight-asian="bold" style:font-name-complex="Fira Sans Light" style:font-size-complex="16pt" style:font-style-complex="italic" style:font-weight-complex="bold"/>
    </style:style>
    <style:style style:name="T43" style:family="text">
      <style:text-properties fo:color="#006699" loext:opacity="100%" style:text-position="-33% 58%" style:font-name="Fira Sans Light1" fo:font-size="15pt" fo:font-style="italic" fo:font-weight="bold" style:font-name-asian="Fira Sans Light" style:font-size-asian="16pt" style:font-style-asian="italic" style:font-weight-asian="bold" style:font-name-complex="Fira Sans Light" style:font-size-complex="16pt" style:font-style-complex="italic" style:font-weight-complex="bold"/>
    </style:style>
    <style:style style:name="T44" style:family="text">
      <style:text-properties fo:color="#996600" loext:opacity="100%" fo:font-size="15pt" fo:font-weight="bold" style:font-size-asian="16pt" style:font-weight-asian="bold" style:font-size-complex="16pt" style:font-weight-complex="bold"/>
    </style:style>
    <style:style style:name="T45" style:family="text">
      <style:text-properties fo:color="#996600" loext:opacity="100%" fo:font-size="15pt" fo:font-weight="normal" style:font-size-asian="16pt" style:font-weight-asian="normal" style:font-size-complex="16pt" style:font-weight-complex="normal"/>
    </style:style>
    <style:style style:name="T46" style:family="text">
      <style:text-properties fo:font-variant="normal" fo:text-transform="none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6633" loext:opacity="100%" style:text-outline="false" style:text-line-through-style="none" style:text-line-through-type="none" style:font-name="Fira Sans Light" fo:font-size="15pt" fo:font-style="normal" fo:text-shadow="none" style:text-underline-style="none" fo:font-weight="normal" style:letter-kerning="true" style:font-name-asian="Fira Sans Light" style:font-size-asian="16pt" style:font-style-asian="normal" style:font-weight-asian="normal" style:font-name-complex="Fira Sans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" style:font-size-asian="16pt" style:font-style-asian="normal" style:font-weight-asian="normal" style:font-name-complex="Fira Sans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6633" loext:opacity="100%" style:text-outline="false" style:text-line-through-style="none" style:text-line-through-type="none" fo:font-size="15pt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5pt" fo:text-shadow="none" style:text-underline-style="none" fo:font-weight="bold" style:letter-kerning="true" style:font-name-asian="Fira Sans Light" style:font-size-asian="16pt" style:font-weight-asian="bold" style:font-name-complex="Fira Sans Light" style:font-size-complex="16pt" style:font-weight-complex="bold" style:text-emphasize="none" style:font-relief="none" style:text-overline-style="none" style:text-overline-color="font-color"/>
    </style:style>
    <style:style style:name="T52" style:family="text">
      <style:text-properties fo:color="#006633" loext:opacity="100%" style:font-name="Fira Sans Light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53" style:family="text">
      <style:text-properties fo:color="#006633" loext:opacity="100%" style:font-name="Fira Sans Light1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54" style:family="text">
      <style:text-properties fo:color="#006633" loext:opacity="100%" style:font-name="Fira Sans Light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55" style:family="text">
      <style:text-properties fo:color="#006633" loext:opacity="100%" style:font-name="Fira Sans Light" fo:font-size="15pt" fo:font-style="normal" fo:font-weight="bold" style:font-name-asian="Fira Sans Light" style:font-size-asian="16pt" style:font-style-asian="normal" style:font-weight-asian="bold" style:font-name-complex="Fira Sans Light" style:font-size-complex="16pt" style:font-style-complex="normal" style:font-weight-complex="bold"/>
    </style:style>
    <style:style style:name="T56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5pt" fo:font-style="normal" fo:text-shadow="none" style:text-underline-style="none" fo:font-weight="bold" style:letter-kerning="true" style:font-name-asian="Fira Sans Light" style:font-size-asian="16pt" style:font-style-asian="normal" style:font-weight-asian="bold" style:font-name-complex="Fira Sans Light" style:font-size-complex="1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006633" loext:opacity="100%"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61" style:family="text">
      <style:text-properties fo:color="#996600" loext:opacity="100%" style:font-name="Fira Sans Light1" fo:font-size="15pt" fo:font-style="italic" fo:font-weight="normal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62" style:family="text">
      <style:text-properties fo:color="#996600" loext:opacity="100%" style:text-position="-33% 58%" style:font-name="Fira Sans Light1" fo:font-size="15pt" fo:font-style="italic" fo:font-weight="normal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63" style:family="text">
      <style:text-properties fo:color="#996600" loext:opacity="100%" fo:font-size="16pt" fo:font-weight="bold" style:font-size-asian="18pt" style:font-weight-asian="bold" style:font-size-complex="18pt" style:font-weight-complex="bold"/>
    </style:style>
    <style:style style:name="T64" style:family="text">
      <style:text-properties fo:color="#996600" loext:opacity="100%" fo:font-size="16pt" fo:font-weight="normal" style:font-size-asian="18pt" style:font-weight-asian="normal" style:font-size-complex="18pt" style:font-weight-complex="normal"/>
    </style:style>
    <style:style style:name="T65" style:family="text">
      <style:text-properties fo:color="#996600" loext:opacity="100%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6" style:family="text">
      <style:text-properties fo:color="#996600" loext:opacity="100%" style:text-position="-33% 58%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7" style:family="text">
      <style:text-properties fo:color="#996600" loext:opacity="100%" fo:font-size="15pt" style:font-size-asian="16pt" style:font-size-complex="16pt"/>
    </style:style>
    <style:style style:name="T68" style:family="text">
      <style:text-properties fo:font-variant="normal" fo:text-transform="none" fo:color="#996600" loext:opacity="100%" style:text-outline="false" style:text-line-through-style="none" style:text-line-through-type="none" style:font-name="Fira Sans Light1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996600" loext:opacity="100%" style:text-outline="false" style:text-line-through-style="none" style:text-line-through-type="none" style:font-name="Fira Sans Light1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996600" loext:opacity="100%" style:text-outline="false" style:text-line-through-style="none" style:text-line-through-type="none" style:font-name="Fira Sans Light1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996600" loext:opacity="100%" style:text-outline="false" style:text-line-through-style="none" style:text-line-through-type="none" style:font-name="Fira Sans Light" fo:font-size="15pt" fo:font-style="normal" fo:text-shadow="none" style:text-underline-style="none" fo:font-weight="normal" style:letter-kerning="true" style:font-name-asian="Fira Sans Light" style:font-size-asian="16pt" style:font-style-asian="normal" style:font-weight-asian="normal" style:font-name-complex="Fira Sans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996600" loext:opacity="100%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" style:font-size-asian="16pt" style:font-style-asian="normal" style:font-weight-asian="normal" style:font-name-complex="Fira Sans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996600" loext:opacity="100%" style:text-outline="false" style:text-line-through-style="none" style:text-line-through-type="none" style:font-name="Fira Sans Light1" fo:font-size="15pt" fo:font-style="normal" fo:text-shadow="none" style:text-underline-style="none" fo:font-weight="bold" style:letter-kerning="true" style:font-name-asian="Fira Sans Light" style:font-size-asian="16pt" style:font-style-asian="normal" style:font-weight-asian="bold" style:font-name-complex="Fira Sans Light" style:font-size-complex="16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996600" loext:opacity="100%" style:font-name="Fira Sans Light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75" style:family="text">
      <style:text-properties fo:color="#996600" loext:opacity="100%" style:font-name="Fira Sans Light1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76" style:family="text">
      <style:text-properties fo:color="#996600" loext:opacity="100%"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77" style:family="text">
      <style:text-properties fo:font-variant="normal" fo:text-transform="none" fo:color="#996600" loext:opacity="100%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style:font-name-asian="Fira Sans Light" style:font-size-asian="16pt" style:font-style-asian="italic" style:font-weight-asian="normal" style:font-name-complex="Fira Sans Light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996600" loext:opacity="100%" style:text-position="-33% 58%"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79" style:family="text">
      <style:text-properties style:use-window-font-color="true" loext:opacity="0%"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fo:font-variant="normal" fo:text-transform="none" fo:color="#003333" loext:opacity="100%" style:text-outline="false" style:text-line-through-style="none" style:text-line-through-type="none" style:font-name="Fira Sans Light" fo:font-size="16pt" fo:font-style="normal" fo:text-shadow="none" style:text-underline-style="none" fo:font-weight="normal" style:letter-kerning="true" style:font-name-asian="Fira Sans Light" style:font-size-asian="18pt" style:font-style-asian="normal" style:font-weight-asian="normal" style:font-name-complex="Fira Sans Light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20pt" fo:font-style="normal" fo:text-shadow="none" style:text-underline-style="none" fo:font-weight="bold" style:letter-kerning="true" style:font-name-asian="Fira Sans Light" style:font-size-asian="22pt" style:font-style-asian="normal" style:font-weight-asian="bold" style:font-name-complex="Fira Sans Light" style:font-size-complex="22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3333" loext:opacity="100%" style:text-outline="false" style:text-line-through-style="none" style:text-line-through-type="none" style:font-name="Fira Sans Light" fo:font-size="15pt" fo:font-style="normal" fo:text-shadow="none" style:text-underline-style="none" fo:font-weight="bold" style:letter-kerning="true" style:font-name-asian="Fira Sans Light" style:font-size-asian="16pt" style:font-style-asian="normal" style:font-weight-asian="bold" style:font-name-complex="Fira Sans Light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le_3a__2f__2f__2f_home_2f_sb17498_2f_.config_2f_libreoffice_2f_4_2f_user_2f_template_2f_MetropolisTemplate.otp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3.685cm" presentation:class="subtitle">
          <draw:text-box>
            <text:p text:style-name="P1"><text:span text:style-name="T1">Multi Agent Systems</text:span></text:p>
            <text:p text:style-name="P1"><text:span text:style-name="T2">- Lab 5 -</text:span></text:p>
            <text:p text:style-name="P1"><text:span text:style-name="T2">Q-Learning and SARS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Value Iteration Recap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Policy </text:span><text:span text:style-name="T4">and </text:span><text:span text:style-name="T3">Value Iteration </text:span><text:span text:style-name="T4">algorithms require knowledge of </text:span><text:span text:style-name="T3">environment dynamics</text:span></text:p>
                <text:p><text:span text:style-name="T3"/></text:p>
                <text:p><text:span text:style-name="T3"/></text:p>
                <text:list>
                  <text:list-item>
                    <text:p><text:span text:style-name="T5">P(s’ | s, a)</text:span><text:span text:style-name="T4"> has to be known</text:span></text:p>
                  </text:list-item>
                </text:list>
                <text:p><text:span text:style-name="T4"/></text:p>
              </text:list-item>
              <text:list-item>
                <text:p><text:span text:style-name="T4">In many real world problems the environment dynamics is not known before hand =&gt; the agent has to </text:span><text:span text:style-name="T5">estimate rewards </text:span><text:span text:style-name="T6">and </text:span><text:span text:style-name="T5">improve its policy </text:span><text:span text:style-name="T6">based on direct interaction with the environment</text:span></text:p>
              </text:list-item>
            </text:list>
          </draw:text-box>
        </draw:frame>
        <draw:frame draw:style-name="gr2" draw:text-style-name="P5" draw:layer="layout" svg:width="12.942cm" svg:height="1.075cm" svg:x="7.632cm" svg:y="5.33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Q-Func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Instead of a </text:span><text:span text:style-name="T5">state value</text:span><text:span text:style-name="T6"> function, we are more explicit, in storing the value of executing </text:span><text:span text:style-name="T5">an action</text:span><text:span text:style-name="T6"> in a </text:span><text:span text:style-name="T5">given state</text:span></text:p>
                <text:p><text:span text:style-name="T6"/></text:p>
                <text:p><text:span text:style-name="T4"/></text:p>
                <text:p><text:span text:style-name="T4"/></text:p>
              </text:list-item>
              <text:list-item>
                <text:p><text:span text:style-name="T4">Bellman equation for q-function</text:span></text:p>
              </text:list-item>
            </text:list>
          </draw:text-box>
        </draw:frame>
        <draw:frame draw:style-name="gr2" draw:text-style-name="P5" draw:layer="layout" svg:width="23.959cm" svg:height="1.184cm" svg:x="1.949cm" svg:y="6.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5" draw:layer="layout" svg:width="25.368cm" svg:height="1.071cm" svg:x="1.316cm" svg:y="10.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Q-Learning Algorithm</text:p>
          </draw:text-box>
        </draw:frame>
        <draw:frame presentation:style-name="pr4" draw:text-style-name="P7" draw:layer="layout" svg:width="12.297cm" svg:height="11.049cm" svg:x="1.4cm" svg:y="3.048cm" presentation:class="outline" presentation:user-transformed="true">
          <draw:text-box>
            <text:p><text:span text:style-name="T7">Agent learns by observing consequences</text:span></text:p>
            <text:p><text:span text:style-name="T7">of actions it takes in the environment</text:span></text:p>
            <text:p><text:span text:style-name="T7"/></text:p>
            <text:p><text:span text:style-name="T7">Q-values adjusted through </text:span><text:span text:style-name="T8">temporal </text:span></text:p>
            <text:p><text:span text:style-name="T8">differences</text:span></text:p>
            <text:p><text:span text:style-name="T7"/></text:p>
            <text:p><text:span text:style-name="T7">Learning is </text:span><text:span text:style-name="T8">off-policy</text:span></text:p>
            <text:p><text:span text:style-name="T8"><text:s text:c="4"/></text:span><text:span text:style-name="T9">Learning policy is greedy</text:span></text:p>
            <text:p><text:span text:style-name="T9"><text:s text:c="4"/></text:span><text:span text:style-name="T9">Play policy allows for exploration</text:span></text:p>
            <text:p><text:span text:style-name="T7"/></text:p>
            <text:p text:style-name="P6"><text:span text:style-name="T10">procedure </text:span><text:span text:style-name="T11">ε</text:span><text:span text:style-name="T12">-Greedy</text:span><text:span text:style-name="T13"> </text:span><text:span text:style-name="T12">(s, q, </text:span><text:span text:style-name="T14">ε</text:span><text:span text:style-name="T15">)</text:span></text:p>
            <text:p text:style-name="P6"><text:span text:style-name="T12"><text:s text:c="4"/></text:span><text:span text:style-name="T12">with prob </text:span><text:span text:style-name="T14">ε: <text:s text:c="3"/>return </text:span><text:span text:style-name="T16">random(A)</text:span><text:span text:style-name="T15"> </text:span></text:p>
            <text:p text:style-name="P6"><text:span text:style-name="T12"><text:s text:c="4"/></text:span><text:span text:style-name="T12">with prob 1-</text:span><text:span text:style-name="T14">ε: return </text:span></text:p>
            <text:p text:style-name="P6"><text:span text:style-name="T17">end </text:span></text:p>
          </draw:text-box>
        </draw:frame>
        <draw:frame presentation:style-name="pr4" draw:text-style-name="P8" draw:layer="layout" svg:width="12.865cm" svg:height="11.049cm" svg:x="14.313cm" svg:y="3.048cm" presentation:class="outline" presentation:user-transformed="true">
          <draw:text-box>
            <text:p text:style-name="P6"><text:span text:style-name="T18">procedure Q-Learning (&lt;S, A, </text:span><text:span text:style-name="T19">γ</text:span><text:span text:style-name="T20">&gt;, </text:span><text:span text:style-name="T14">ε</text:span><text:span text:style-name="T21">)</text:span></text:p>
            <text:p text:style-name="P6"><text:span text:style-name="T22"><text:s text:c="4"/></text:span><text:span text:style-name="T21">for</text:span><text:span text:style-name="T22"> all s in S, a in A </text:span><text:span text:style-name="T21">do</text:span></text:p>
            <text:p text:style-name="P6"><text:span text:style-name="T22"><text:s text:c="8"/></text:span><text:span text:style-name="T23">q(s,a) ← 0</text:span><text:span text:style-name="T22"><text:tab/></text:span><text:span text:style-name="T22"><text:tab/></text:span><text:span text:style-name="T22">// set initial values to 0</text:span></text:p>
            <text:p text:style-name="P6"><text:span text:style-name="T22"><text:s text:c="4"/></text:span><text:span text:style-name="T21">end for</text:span></text:p>
            <text:p text:style-name="P6"><text:span text:style-name="T22"><text:s text:c="4"/></text:span><text:span text:style-name="T21">for</text:span><text:span text:style-name="T22"> all episodes </text:span><text:span text:style-name="T21">do</text:span></text:p>
            <text:p text:style-name="P6"><text:span text:style-name="T21"><text:s text:c="8"/></text:span><text:span text:style-name="T22">s ← initial state </text:span></text:p>
            <text:p text:style-name="P6"><text:span text:style-name="T22"><text:s text:c="8"/></text:span><text:span text:style-name="T21">while </text:span><text:span text:style-name="T22">s not final state </text:span><text:span text:style-name="T21">do</text:span></text:p>
            <text:p text:style-name="P6"><text:span text:style-name="T24"><text:s text:c="12"/></text:span><text:span text:style-name="T25">pick action </text:span><text:span text:style-name="T26">a </text:span><text:span text:style-name="T27">using </text:span><text:span text:style-name="T11">ε</text:span><text:span text:style-name="T12">-Greedy</text:span><text:span text:style-name="T28"> </text:span><text:span text:style-name="T12">(s, q, </text:span><text:span text:style-name="T14">ε</text:span><text:span text:style-name="T15">)</text:span></text:p>
            <text:p text:style-name="P6"><text:span text:style-name="T15"><text:s text:c="13"/></text:span><text:span text:style-name="T15">execute </text:span><text:span text:style-name="T29">a</text:span><text:span text:style-name="T15"> → get reward r and next state </text:span><text:span text:style-name="T29">s’</text:span></text:p>
            <text:p text:style-name="P6"><text:span text:style-name="T30"><text:s text:c="13"/></text:span><text:span text:style-name="T29">q(s, a) ← q(s, a) + α(r + γmax</text:span><text:span text:style-name="T31">a’</text:span><text:span text:style-name="T29">q(s’,a’ ) - q(s, a))</text:span></text:p>
            <text:p text:style-name="P6"><text:span text:style-name="T15"><text:s text:c="13"/></text:span><text:span text:style-name="T29">s ← s’</text:span></text:p>
            <text:p text:style-name="P6"><text:span text:style-name="T22"><text:s text:c="8"/></text:span><text:span text:style-name="T21">end while</text:span></text:p>
            <text:p text:style-name="P6"><text:span text:style-name="T21"><text:s text:c="4"/></text:span><text:span text:style-name="T21">end for</text:span><text:span text:style-name="T22"> </text:span></text:p>
            <text:p text:style-name="P6"><text:span text:style-name="T22"><text:s text:c="4"/></text:span><text:span text:style-name="T21">for</text:span><text:span text:style-name="T22"> all </text:span><text:span text:style-name="T23">s</text:span><text:span text:style-name="T22"> in S </text:span><text:span text:style-name="T21">do</text:span></text:p>
            <text:p text:style-name="P6"><text:span text:style-name="T21"><text:s text:c="8"/></text:span><text:span text:style-name="T23">π(s)</text:span><text:span text:style-name="T22"> ← </text:span><text:span text:style-name="T23">argmax</text:span><text:span text:style-name="T32">a in A</text:span><text:span text:style-name="T23"> q(s, a)</text:span></text:p>
            <text:p text:style-name="P6"><text:span text:style-name="T22"><text:s text:c="4"/></text:span><text:span text:style-name="T21">end for </text:span></text:p>
            <text:p text:style-name="P6"><text:span text:style-name="T20"><text:s text:c="4"/></text:span><text:span text:style-name="T20">return </text:span><text:span text:style-name="T23">π</text:span></text:p>
            <text:p text:style-name="P6"><text:span text:style-name="T22"><text:s text:c="4"/></text:span></text:p>
          </draw:text-box>
        </draw:frame>
        <draw:frame draw:style-name="gr2" draw:text-style-name="P5" draw:layer="layout" svg:width="3.589cm" svg:height="0.758cm" svg:x="6.509cm" svg:y="12.6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Q-Learning Algorithm</text:p>
          </draw:text-box>
        </draw:frame>
        <draw:frame presentation:style-name="pr4" draw:text-style-name="P7" draw:layer="layout" svg:width="12.297cm" svg:height="11.049cm" svg:x="1.4cm" svg:y="3.048cm" presentation:class="outline" presentation:user-transformed="true">
          <draw:text-box>
            <text:p><text:span text:style-name="T33">Agent learns by observing consequences</text:span></text:p>
            <text:p><text:span text:style-name="T33">of actions it takes in the environment</text:span></text:p>
            <text:p><text:span text:style-name="T7"/></text:p>
            <text:p><text:span text:style-name="T7">Q-values adjusted through </text:span><text:span text:style-name="T8">temporal </text:span></text:p>
            <text:p><text:span text:style-name="T8">differences</text:span></text:p>
            <text:p><text:span text:style-name="T7"/></text:p>
            <text:p><text:span text:style-name="T7">Learning is </text:span><text:span text:style-name="T8">off-policy</text:span></text:p>
            <text:p><text:span text:style-name="T8"><text:s text:c="4"/></text:span><text:span text:style-name="T9">Learning policy is greedy</text:span></text:p>
            <text:p><text:span text:style-name="T9"><text:s text:c="4"/></text:span><text:span text:style-name="T9">Play policy allows for exploration</text:span></text:p>
            <text:p><text:span text:style-name="T7"/></text:p>
            <text:p text:style-name="P6"><text:span text:style-name="T10">procedure </text:span><text:span text:style-name="T11">ε</text:span><text:span text:style-name="T12">-Greedy</text:span><text:span text:style-name="T13"> </text:span><text:span text:style-name="T12">(s, q, </text:span><text:span text:style-name="T14">ε</text:span><text:span text:style-name="T15">)</text:span></text:p>
            <text:p text:style-name="P6"><text:span text:style-name="T12"><text:s text:c="4"/></text:span><text:span text:style-name="T12">with prob </text:span><text:span text:style-name="T14">ε: <text:s text:c="3"/>return </text:span><text:span text:style-name="T16">random(A)</text:span><text:span text:style-name="T15"> </text:span></text:p>
            <text:p text:style-name="P6"><text:span text:style-name="T12"><text:s text:c="4"/></text:span><text:span text:style-name="T12">with prob 1-</text:span><text:span text:style-name="T14">ε: return </text:span></text:p>
            <text:p text:style-name="P6"><text:span text:style-name="T17">end </text:span></text:p>
          </draw:text-box>
        </draw:frame>
        <draw:frame presentation:style-name="pr4" draw:text-style-name="P8" draw:layer="layout" svg:width="12.865cm" svg:height="11.049cm" svg:x="14.313cm" svg:y="3.048cm" presentation:class="outline" presentation:user-transformed="true">
          <draw:text-box>
            <text:p text:style-name="P6"><text:span text:style-name="T18">procedure Q-Learning (&lt;S, A, </text:span><text:span text:style-name="T19">γ</text:span><text:span text:style-name="T20">&gt;, </text:span><text:span text:style-name="T14">ε</text:span><text:span text:style-name="T21">)</text:span></text:p>
            <text:p text:style-name="P6"><text:span text:style-name="T22"><text:s text:c="4"/></text:span><text:span text:style-name="T21">for</text:span><text:span text:style-name="T22"> all s in S, a in A </text:span><text:span text:style-name="T21">do</text:span></text:p>
            <text:p text:style-name="P6"><text:span text:style-name="T22"><text:s text:c="8"/></text:span><text:span text:style-name="T23">q(s,a) ← 0</text:span><text:span text:style-name="T22"><text:tab/></text:span><text:span text:style-name="T22"><text:tab/></text:span><text:span text:style-name="T22">// set initial values to 0</text:span></text:p>
            <text:p text:style-name="P6"><text:span text:style-name="T22"><text:s text:c="4"/></text:span><text:span text:style-name="T21">end for</text:span></text:p>
            <text:p text:style-name="P6"><text:span text:style-name="T22"><text:s text:c="4"/></text:span><text:span text:style-name="T34">for</text:span><text:span text:style-name="T35"> all episodes </text:span><text:span text:style-name="T34">do</text:span></text:p>
            <text:p text:style-name="P6"><text:span text:style-name="T21"><text:s text:c="8"/></text:span><text:span text:style-name="T35">s ← initial state </text:span></text:p>
            <text:p text:style-name="P6"><text:span text:style-name="T22"><text:s text:c="8"/></text:span><text:span text:style-name="T34">while </text:span><text:span text:style-name="T35">s not final state </text:span><text:span text:style-name="T34">do</text:span></text:p>
            <text:p text:style-name="P6"><text:span text:style-name="T36"><text:s text:c="12"/></text:span><text:span text:style-name="T37">pick action </text:span><text:span text:style-name="T38">a</text:span><text:span text:style-name="T26"> </text:span><text:span text:style-name="T27">using </text:span><text:span text:style-name="T11">ε</text:span><text:span text:style-name="T12">-Greedy</text:span><text:span text:style-name="T28"> </text:span><text:span text:style-name="T12">(s, q, </text:span><text:span text:style-name="T14">ε</text:span><text:span text:style-name="T15">)</text:span></text:p>
            <text:p text:style-name="P6"><text:span text:style-name="T15"><text:s text:c="13"/></text:span><text:span text:style-name="T39">execute </text:span><text:span text:style-name="T40">a</text:span><text:span text:style-name="T39"> → get reward r and next state </text:span><text:span text:style-name="T40">s’</text:span></text:p>
            <text:p text:style-name="P6"><text:span text:style-name="T30"><text:s text:c="13"/></text:span><text:span text:style-name="T29">q(s, a) ← q(s, a) + α(r + γmax</text:span><text:span text:style-name="T31">a’</text:span><text:span text:style-name="T29">q(s’,a’ ) - q(s, a))</text:span></text:p>
            <text:p text:style-name="P6"><text:span text:style-name="T15"><text:s text:c="13"/></text:span><text:span text:style-name="T40">s ← s’</text:span></text:p>
            <text:p text:style-name="P6"><text:span text:style-name="T22"><text:s text:c="8"/></text:span><text:span text:style-name="T34">end while</text:span></text:p>
            <text:p text:style-name="P6"><text:span text:style-name="T21"><text:s text:c="4"/></text:span><text:span text:style-name="T21">end for</text:span><text:span text:style-name="T22"> </text:span></text:p>
            <text:p text:style-name="P6"><text:span text:style-name="T22"><text:s text:c="4"/></text:span><text:span text:style-name="T21">for</text:span><text:span text:style-name="T22"> all </text:span><text:span text:style-name="T23">s</text:span><text:span text:style-name="T22"> in S </text:span><text:span text:style-name="T21">do</text:span></text:p>
            <text:p text:style-name="P6"><text:span text:style-name="T21"><text:s text:c="8"/></text:span><text:span text:style-name="T23">π(s)</text:span><text:span text:style-name="T22"> ← </text:span><text:span text:style-name="T23">argmax</text:span><text:span text:style-name="T32">a in A</text:span><text:span text:style-name="T23"> q(s, a)</text:span></text:p>
            <text:p text:style-name="P6"><text:span text:style-name="T22"><text:s text:c="4"/></text:span><text:span text:style-name="T21">end for </text:span></text:p>
            <text:p text:style-name="P6"><text:span text:style-name="T20"><text:s text:c="4"/></text:span><text:span text:style-name="T20">return </text:span><text:span text:style-name="T23">π</text:span></text:p>
            <text:p text:style-name="P6"><text:span text:style-name="T22"><text:s text:c="4"/></text:span></text:p>
          </draw:text-box>
        </draw:frame>
        <draw:frame draw:style-name="gr2" draw:text-style-name="P5" draw:layer="layout" svg:width="3.589cm" svg:height="0.758cm" svg:x="6.509cm" svg:y="12.6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Q-Learning Algorithm</text:p>
          </draw:text-box>
        </draw:frame>
        <draw:frame presentation:style-name="pr4" draw:text-style-name="P7" draw:layer="layout" svg:width="12.297cm" svg:height="11.049cm" svg:x="1.4cm" svg:y="3.048cm" presentation:class="outline" presentation:user-transformed="true">
          <draw:text-box>
            <text:p><text:span text:style-name="T7">Agent learns by observing consequences</text:span></text:p>
            <text:p><text:span text:style-name="T7">of actions it takes in the environment</text:span></text:p>
            <text:p><text:span text:style-name="T7"/></text:p>
            <text:p><text:span text:style-name="T33">Q-values adjusted through </text:span><text:span text:style-name="T41">temporal </text:span></text:p>
            <text:p><text:span text:style-name="T41">differences</text:span></text:p>
            <text:p><text:span text:style-name="T7"/></text:p>
            <text:p><text:span text:style-name="T7">Learning is </text:span><text:span text:style-name="T8">off-policy</text:span></text:p>
            <text:p><text:span text:style-name="T8"><text:s text:c="4"/></text:span><text:span text:style-name="T9">Learning policy is greedy</text:span></text:p>
            <text:p><text:span text:style-name="T9"><text:s text:c="4"/></text:span><text:span text:style-name="T9">Play policy allows for exploration</text:span></text:p>
            <text:p><text:span text:style-name="T7"/></text:p>
            <text:p text:style-name="P6"><text:span text:style-name="T10">procedure </text:span><text:span text:style-name="T11">ε</text:span><text:span text:style-name="T12">-Greedy</text:span><text:span text:style-name="T13"> </text:span><text:span text:style-name="T12">(s, q, </text:span><text:span text:style-name="T14">ε</text:span><text:span text:style-name="T15">)</text:span></text:p>
            <text:p text:style-name="P6"><text:span text:style-name="T12"><text:s text:c="4"/></text:span><text:span text:style-name="T12">with prob </text:span><text:span text:style-name="T14">ε: <text:s text:c="3"/>return </text:span><text:span text:style-name="T16">random(A)</text:span><text:span text:style-name="T15"> </text:span></text:p>
            <text:p text:style-name="P6"><text:span text:style-name="T12"><text:s text:c="4"/></text:span><text:span text:style-name="T12">with prob 1-</text:span><text:span text:style-name="T14">ε: return </text:span></text:p>
            <text:p text:style-name="P6"><text:span text:style-name="T17">end </text:span></text:p>
          </draw:text-box>
        </draw:frame>
        <draw:frame presentation:style-name="pr4" draw:text-style-name="P8" draw:layer="layout" svg:width="12.865cm" svg:height="11.049cm" svg:x="14.313cm" svg:y="3.048cm" presentation:class="outline" presentation:user-transformed="true">
          <draw:text-box>
            <text:p text:style-name="P6"><text:span text:style-name="T18">procedure Q-Learning (&lt;S, A, </text:span><text:span text:style-name="T19">γ</text:span><text:span text:style-name="T20">&gt;, </text:span><text:span text:style-name="T14">ε</text:span><text:span text:style-name="T21">)</text:span></text:p>
            <text:p text:style-name="P6"><text:span text:style-name="T22"><text:s text:c="4"/></text:span><text:span text:style-name="T21">for</text:span><text:span text:style-name="T22"> all s in S, a in A </text:span><text:span text:style-name="T21">do</text:span></text:p>
            <text:p text:style-name="P6"><text:span text:style-name="T22"><text:s text:c="8"/></text:span><text:span text:style-name="T23">q(s,a) ← 0</text:span><text:span text:style-name="T22"><text:tab/></text:span><text:span text:style-name="T22"><text:tab/></text:span><text:span text:style-name="T22">// set initial values to 0</text:span></text:p>
            <text:p text:style-name="P6"><text:span text:style-name="T22"><text:s text:c="4"/></text:span><text:span text:style-name="T21">end for</text:span></text:p>
            <text:p text:style-name="P6"><text:span text:style-name="T22"><text:s text:c="4"/></text:span><text:span text:style-name="T21">for</text:span><text:span text:style-name="T22"> all episodes </text:span><text:span text:style-name="T21">do</text:span></text:p>
            <text:p text:style-name="P6"><text:span text:style-name="T21"><text:s text:c="8"/></text:span><text:span text:style-name="T22">s ← initial state </text:span></text:p>
            <text:p text:style-name="P6"><text:span text:style-name="T22"><text:s text:c="8"/></text:span><text:span text:style-name="T21">while </text:span><text:span text:style-name="T22">s not final state </text:span><text:span text:style-name="T21">do</text:span></text:p>
            <text:p text:style-name="P6"><text:span text:style-name="T24"><text:s text:c="12"/></text:span><text:span text:style-name="T25">pick action </text:span><text:span text:style-name="T26">a </text:span><text:span text:style-name="T27">using </text:span><text:span text:style-name="T11">ε</text:span><text:span text:style-name="T12">-Greedy</text:span><text:span text:style-name="T28"> </text:span><text:span text:style-name="T12">(s, q, </text:span><text:span text:style-name="T14">ε</text:span><text:span text:style-name="T15">)</text:span></text:p>
            <text:p text:style-name="P6"><text:span text:style-name="T15"><text:s text:c="13"/></text:span><text:span text:style-name="T15">execute </text:span><text:span text:style-name="T29">a</text:span><text:span text:style-name="T15"> → get reward r and next state </text:span><text:span text:style-name="T29">s’</text:span></text:p>
            <text:p text:style-name="P6"><text:span text:style-name="T30"><text:s text:c="13"/></text:span><text:span text:style-name="T40">q(s, a) ← q(s, a) + α(</text:span><text:span text:style-name="T42">r + γmax</text:span><text:span text:style-name="T43">a’</text:span><text:span text:style-name="T42">q(s’,a’ ) - q(s, a)</text:span><text:span text:style-name="T40">)</text:span></text:p>
            <text:p text:style-name="P6"><text:span text:style-name="T15"><text:s text:c="13"/></text:span><text:span text:style-name="T29">s ← s’</text:span></text:p>
            <text:p text:style-name="P6"><text:span text:style-name="T22"><text:s text:c="8"/></text:span><text:span text:style-name="T21">end while</text:span></text:p>
            <text:p text:style-name="P6"><text:span text:style-name="T21"><text:s text:c="4"/></text:span><text:span text:style-name="T21">end for</text:span><text:span text:style-name="T22"> </text:span></text:p>
            <text:p text:style-name="P6"><text:span text:style-name="T22"><text:s text:c="4"/></text:span><text:span text:style-name="T21">for</text:span><text:span text:style-name="T22"> all </text:span><text:span text:style-name="T23">s</text:span><text:span text:style-name="T22"> in S </text:span><text:span text:style-name="T21">do</text:span></text:p>
            <text:p text:style-name="P6"><text:span text:style-name="T21"><text:s text:c="8"/></text:span><text:span text:style-name="T23">π(s)</text:span><text:span text:style-name="T22"> ← </text:span><text:span text:style-name="T23">argmax</text:span><text:span text:style-name="T32">a in A</text:span><text:span text:style-name="T23"> q(s, a)</text:span></text:p>
            <text:p text:style-name="P6"><text:span text:style-name="T22"><text:s text:c="4"/></text:span><text:span text:style-name="T21">end for </text:span></text:p>
            <text:p text:style-name="P6"><text:span text:style-name="T20"><text:s text:c="4"/></text:span><text:span text:style-name="T20">return </text:span><text:span text:style-name="T23">π</text:span></text:p>
            <text:p text:style-name="P6"><text:span text:style-name="T22"><text:s text:c="4"/></text:span></text:p>
          </draw:text-box>
        </draw:frame>
        <draw:frame draw:style-name="gr2" draw:text-style-name="P5" draw:layer="layout" svg:width="3.589cm" svg:height="0.758cm" svg:x="6.509cm" svg:y="12.6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Q-Learning Algorithm</text:p>
          </draw:text-box>
        </draw:frame>
        <draw:frame presentation:style-name="pr4" draw:text-style-name="P7" draw:layer="layout" svg:width="12.297cm" svg:height="11.049cm" svg:x="1.4cm" svg:y="3.048cm" presentation:class="outline" presentation:user-transformed="true">
          <draw:text-box>
            <text:p><text:span text:style-name="T7">Agent learns by observing consequences</text:span></text:p>
            <text:p><text:span text:style-name="T7">of actions it takes in the environment</text:span></text:p>
            <text:p><text:span text:style-name="T7"/></text:p>
            <text:p><text:span text:style-name="T7">Q-values adjusted through </text:span><text:span text:style-name="T8">temporal </text:span></text:p>
            <text:p><text:span text:style-name="T8">differences</text:span></text:p>
            <text:p><text:span text:style-name="T7"/></text:p>
            <text:p><text:span text:style-name="T7">Learning is </text:span><text:span text:style-name="T8">off-policy</text:span></text:p>
            <text:p><text:span text:style-name="T44"><text:s text:c="4"/></text:span><text:span text:style-name="T45">Learning policy is greedy</text:span></text:p>
            <text:p text:style-name="P10"><text:span text:style-name="T46"><text:s text:c="4"/></text:span><text:span text:style-name="T47">Exploration policy is </text:span><text:span text:style-name="T48">ε</text:span><text:span text:style-name="T49">-Greedy (tradeoff </text:span></text:p>
            <text:p text:style-name="P10"><text:span text:style-name="T49"><text:s text:c="4"/></text:span><text:span text:style-name="T49">Exploration ↔ Exploitation)</text:span></text:p>
            <text:p><text:span text:style-name="T7"/></text:p>
            <text:p text:style-name="P6"><text:span text:style-name="T50">procedure </text:span><text:span text:style-name="T48">ε</text:span><text:span text:style-name="T49">-Greedy</text:span><text:span text:style-name="T51"> </text:span><text:span text:style-name="T49">(s, q, </text:span><text:span text:style-name="T52">ε</text:span><text:span text:style-name="T53">)</text:span></text:p>
            <text:p text:style-name="P6"><text:span text:style-name="T49"><text:s text:c="4"/></text:span><text:span text:style-name="T49">with prob </text:span><text:span text:style-name="T52">ε: <text:s text:c="3"/>return </text:span><text:span text:style-name="T54">random(A)</text:span><text:span text:style-name="T53"> </text:span></text:p>
            <text:p text:style-name="P6"><text:span text:style-name="T49"><text:s text:c="4"/></text:span><text:span text:style-name="T49">with prob 1-</text:span><text:span text:style-name="T52">ε: return </text:span></text:p>
            <text:p text:style-name="P6"><text:span text:style-name="T55">end </text:span></text:p>
          </draw:text-box>
        </draw:frame>
        <draw:frame presentation:style-name="pr4" draw:text-style-name="P8" draw:layer="layout" svg:width="12.865cm" svg:height="11.049cm" svg:x="14.313cm" svg:y="3.048cm" presentation:class="outline" presentation:user-transformed="true">
          <draw:text-box>
            <text:p text:style-name="P6"><text:span text:style-name="T18">procedure Q-Learning (&lt;S, A, </text:span><text:span text:style-name="T19">γ</text:span><text:span text:style-name="T20">&gt;, </text:span><text:span text:style-name="T14">ε</text:span><text:span text:style-name="T21">)</text:span></text:p>
            <text:p text:style-name="P6"><text:span text:style-name="T22"><text:s text:c="4"/></text:span><text:span text:style-name="T21">for</text:span><text:span text:style-name="T22"> all s in S, a in A </text:span><text:span text:style-name="T21">do</text:span></text:p>
            <text:p text:style-name="P6"><text:span text:style-name="T22"><text:s text:c="8"/></text:span><text:span text:style-name="T23">q(s,a) ← 0</text:span><text:span text:style-name="T22"><text:tab/></text:span><text:span text:style-name="T22"><text:tab/></text:span><text:span text:style-name="T22">// set initial values to 0</text:span></text:p>
            <text:p text:style-name="P6"><text:span text:style-name="T22"><text:s text:c="4"/></text:span><text:span text:style-name="T21">end for</text:span></text:p>
            <text:p text:style-name="P6"><text:span text:style-name="T22"><text:s text:c="4"/></text:span><text:span text:style-name="T21">for</text:span><text:span text:style-name="T22"> all episodes </text:span><text:span text:style-name="T21">do</text:span></text:p>
            <text:p text:style-name="P6"><text:span text:style-name="T21"><text:s text:c="8"/></text:span><text:span text:style-name="T22">s ← initial state </text:span></text:p>
            <text:p text:style-name="P6"><text:span text:style-name="T22"><text:s text:c="8"/></text:span><text:span text:style-name="T21">while </text:span><text:span text:style-name="T22">s not final state </text:span><text:span text:style-name="T21">do</text:span></text:p>
            <text:p text:style-name="P6"><text:span text:style-name="T24"><text:s text:c="12"/></text:span><text:span text:style-name="T56">pick action </text:span><text:span text:style-name="T57">a </text:span><text:span text:style-name="T58">using </text:span><text:span text:style-name="T48">ε</text:span><text:span text:style-name="T49">-Greedy</text:span><text:span text:style-name="T59"> </text:span><text:span text:style-name="T49">(s, q, </text:span><text:span text:style-name="T52">ε</text:span><text:span text:style-name="T53">)</text:span></text:p>
            <text:p text:style-name="P6"><text:span text:style-name="T53"><text:s text:c="13"/></text:span><text:span text:style-name="T53">execute </text:span><text:span text:style-name="T60">a</text:span><text:span text:style-name="T15"> → get reward r and next state </text:span><text:span text:style-name="T29">s’</text:span></text:p>
            <text:p text:style-name="P6"><text:span text:style-name="T30"><text:s text:c="13"/></text:span><text:span text:style-name="T29">q(s, a) ← q(s, a) + α(r + γ</text:span><text:span text:style-name="T61">max</text:span><text:span text:style-name="T62">a’</text:span><text:span text:style-name="T61">q(s’,a’ )</text:span><text:span text:style-name="T29"> - q(s, a))</text:span></text:p>
            <text:p text:style-name="P6"><text:span text:style-name="T15"><text:s text:c="13"/></text:span><text:span text:style-name="T29">s ← s’</text:span></text:p>
            <text:p text:style-name="P6"><text:span text:style-name="T22"><text:s text:c="8"/></text:span><text:span text:style-name="T21">end while</text:span></text:p>
            <text:p text:style-name="P6"><text:span text:style-name="T21"><text:s text:c="4"/></text:span><text:span text:style-name="T21">end for</text:span><text:span text:style-name="T22"> </text:span></text:p>
            <text:p text:style-name="P6"><text:span text:style-name="T22"><text:s text:c="4"/></text:span><text:span text:style-name="T63">for</text:span><text:span text:style-name="T64"> all </text:span><text:span text:style-name="T65">s</text:span><text:span text:style-name="T64"> in S </text:span><text:span text:style-name="T63">do</text:span></text:p>
            <text:p text:style-name="P6"><text:span text:style-name="T63"><text:s text:c="8"/></text:span><text:span text:style-name="T65">π(s)</text:span><text:span text:style-name="T64"> ← </text:span><text:span text:style-name="T65">argmax</text:span><text:span text:style-name="T66">a in A</text:span><text:span text:style-name="T65"> q(s, a)</text:span></text:p>
            <text:p text:style-name="P6"><text:span text:style-name="T64"><text:s text:c="4"/></text:span><text:span text:style-name="T63">end for </text:span></text:p>
            <text:p text:style-name="P6"><text:span text:style-name="T20"><text:s text:c="4"/></text:span><text:span text:style-name="T20">return </text:span><text:span text:style-name="T23">π</text:span></text:p>
            <text:p text:style-name="P6"><text:span text:style-name="T22"><text:s text:c="4"/></text:span></text:p>
          </draw:text-box>
        </draw:frame>
        <draw:frame draw:style-name="gr2" draw:text-style-name="P5" draw:layer="layout" svg:width="3.589cm" svg:height="0.758cm" svg:x="5.909cm" svg:y="12.88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SARSA Algorithm</text:p>
          </draw:text-box>
        </draw:frame>
        <draw:frame presentation:style-name="pr4" draw:text-style-name="P7" draw:layer="layout" svg:width="12.297cm" svg:height="10.412cm" svg:x="1.4cm" svg:y="3.685cm" presentation:class="outline" presentation:user-transformed="true">
          <draw:text-box>
            <text:p><text:span text:style-name="T7">Agent learns by observing consequences</text:span></text:p>
            <text:p><text:span text:style-name="T7">of actions it takes in the environment</text:span></text:p>
            <text:p><text:span text:style-name="T7"/></text:p>
            <text:p><text:span text:style-name="T7">Q-values adjusted through </text:span><text:span text:style-name="T8">temporal </text:span></text:p>
            <text:p><text:span text:style-name="T8">differences</text:span></text:p>
            <text:p><text:span text:style-name="T7"/></text:p>
            <text:p text:style-name="P6"><text:span text:style-name="T67">Learning is </text:span><text:span text:style-name="T44">on-policy</text:span></text:p>
            <text:p text:style-name="P6"><text:span text:style-name="T44"><text:s text:c="4"/></text:span><text:span text:style-name="T45">Action used to explore = <text:s/></text:span></text:p>
            <text:p text:style-name="P6"><text:span text:style-name="T45"><text:s text:c="4"/></text:span><text:span text:style-name="T45">action used for updating the q-values</text:span></text:p>
            <text:p text:style-name="P6"><text:span text:style-name="T7"/></text:p>
            <text:p text:style-name="P6"><text:span text:style-name="T10">procedure </text:span><text:span text:style-name="T11">ε</text:span><text:span text:style-name="T12">-Greedy</text:span><text:span text:style-name="T13"> </text:span><text:span text:style-name="T12">(s, q, </text:span><text:span text:style-name="T14">ε</text:span><text:span text:style-name="T15">)</text:span></text:p>
            <text:p text:style-name="P6"><text:span text:style-name="T12"><text:s text:c="4"/></text:span><text:span text:style-name="T12">with prob </text:span><text:span text:style-name="T14">ε: <text:s text:c="3"/>return </text:span><text:span text:style-name="T16">random(A)</text:span><text:span text:style-name="T15"> </text:span></text:p>
            <text:p text:style-name="P6"><text:span text:style-name="T12"><text:s text:c="4"/></text:span><text:span text:style-name="T12">with prob 1-</text:span><text:span text:style-name="T14">ε: return </text:span></text:p>
            <text:p text:style-name="P6"><text:span text:style-name="T17">end </text:span></text:p>
          </draw:text-box>
        </draw:frame>
        <draw:frame presentation:style-name="pr4" draw:text-style-name="P8" draw:layer="layout" svg:width="13.373cm" svg:height="10.412cm" svg:x="14.313cm" svg:y="3.685cm" presentation:class="outline" presentation:user-transformed="true">
          <draw:text-box>
            <text:p text:style-name="P6"><text:span text:style-name="T18">procedure SARSA (&lt;S, A, </text:span><text:span text:style-name="T19">γ</text:span><text:span text:style-name="T20">&gt;, </text:span><text:span text:style-name="T14">ε</text:span><text:span text:style-name="T21">)</text:span></text:p>
            <text:p text:style-name="P6"><text:span text:style-name="T22"><text:s text:c="4"/></text:span><text:span text:style-name="T21">for</text:span><text:span text:style-name="T22"> all s in S, a in A </text:span><text:span text:style-name="T21">do</text:span></text:p>
            <text:p text:style-name="P6"><text:span text:style-name="T22"><text:s text:c="8"/></text:span><text:span text:style-name="T23">q(s,a) ← 0</text:span><text:span text:style-name="T22"><text:tab/></text:span><text:span text:style-name="T22"><text:tab/></text:span><text:span text:style-name="T22">// set initial values to 0</text:span></text:p>
            <text:p text:style-name="P6"><text:span text:style-name="T22"><text:s text:c="4"/></text:span><text:span text:style-name="T21">end for</text:span></text:p>
            <text:p text:style-name="P6"><text:span text:style-name="T22"><text:s text:c="4"/></text:span><text:span text:style-name="T21">for</text:span><text:span text:style-name="T22"> all episodes </text:span><text:span text:style-name="T21">do</text:span></text:p>
            <text:p text:style-name="P6"><text:span text:style-name="T21"><text:s text:c="8"/></text:span><text:span text:style-name="T22">s ← initial state </text:span></text:p>
            <text:p text:style-name="P6"><text:span text:style-name="T20"><text:s text:c="8"/></text:span><text:span text:style-name="T68">pick action </text:span><text:span text:style-name="T69">a </text:span><text:span text:style-name="T70">from </text:span><text:span text:style-name="T69">s </text:span><text:span text:style-name="T70">using </text:span><text:span text:style-name="T71">ε</text:span><text:span text:style-name="T72">-Greedy</text:span><text:span text:style-name="T73"> </text:span><text:span text:style-name="T72">(s, q, </text:span><text:span text:style-name="T74">ε</text:span><text:span text:style-name="T75">)</text:span></text:p>
            <text:p text:style-name="P6"><text:span text:style-name="T22"><text:s text:c="8"/></text:span><text:span text:style-name="T21">while </text:span><text:span text:style-name="T22">s not final state </text:span><text:span text:style-name="T21">do</text:span></text:p>
            <text:p text:style-name="P6"><text:span text:style-name="T15"><text:s text:c="13"/></text:span><text:span text:style-name="T75">execute </text:span><text:span text:style-name="T76">a</text:span><text:span text:style-name="T75"> → get reward r and next state </text:span><text:span text:style-name="T76">s’</text:span></text:p>
            <text:p text:style-name="P6"><text:span text:style-name="T77"><text:s text:c="13"/></text:span><text:span text:style-name="T72">Pick action a’ from s’ using</text:span><text:span text:style-name="T73"> </text:span><text:span text:style-name="T71">ε</text:span><text:span text:style-name="T72">-Greedy</text:span><text:span text:style-name="T73"> </text:span><text:span text:style-name="T72">(s’, q, </text:span><text:span text:style-name="T74">ε</text:span><text:span text:style-name="T75">)</text:span></text:p>
            <text:p text:style-name="P6"><text:span text:style-name="T30"><text:s text:c="13"/></text:span><text:span text:style-name="T29">q(s, a) ← q(s, a) + α(</text:span><text:span text:style-name="T76">r + γ</text:span><text:span text:style-name="T78"> </text:span><text:span text:style-name="T76">q(s’,a’ ) </text:span><text:span text:style-name="T79">- q(s, a)</text:span><text:span text:style-name="T29">)</text:span></text:p>
            <text:p text:style-name="P6"><text:span text:style-name="T15"><text:s text:c="13"/></text:span><text:span text:style-name="T76">s ← s’, a ← a’</text:span></text:p>
            <text:p text:style-name="P6"><text:span text:style-name="T22"><text:s text:c="8"/></text:span><text:span text:style-name="T21">end while</text:span></text:p>
            <text:p text:style-name="P6"><text:span text:style-name="T21"><text:s text:c="4"/></text:span><text:span text:style-name="T21">end for</text:span><text:span text:style-name="T22"> </text:span></text:p>
            <text:p text:style-name="P6"><text:span text:style-name="T22"><text:s text:c="4"/></text:span><text:span text:style-name="T21">for</text:span><text:span text:style-name="T22"> all </text:span><text:span text:style-name="T23">s</text:span><text:span text:style-name="T22"> in S </text:span><text:span text:style-name="T21">do</text:span></text:p>
            <text:p text:style-name="P6"><text:span text:style-name="T21"><text:s text:c="8"/></text:span><text:span text:style-name="T23">π(s)</text:span><text:span text:style-name="T22"> ← </text:span><text:span text:style-name="T23">argmax</text:span><text:span text:style-name="T32">a in A</text:span><text:span text:style-name="T23"> q(s, a)</text:span></text:p>
            <text:p text:style-name="P6"><text:span text:style-name="T22"><text:s text:c="4"/></text:span><text:span text:style-name="T21">end for </text:span></text:p>
            <text:p text:style-name="P6"><text:span text:style-name="T20"><text:s text:c="4"/></text:span><text:span text:style-name="T20">return </text:span><text:span text:style-name="T23">π</text:span></text:p>
            <text:p text:style-name="P6"><text:span text:style-name="T22"><text:s text:c="4"/></text:span></text:p>
          </draw:text-box>
        </draw:frame>
        <draw:frame draw:style-name="gr2" draw:text-style-name="P5" draw:layer="layout" svg:width="3.589cm" svg:height="0.758cm" svg:x="6.209cm" svg:y="12.95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OpenAI Gym Environments</text:p>
          </draw:text-box>
        </draw:frame>
        <draw:frame presentation:style-name="pr4" draw:layer="layout" svg:width="25.199cm" svg:height="9.84cm" svg:x="1.4cm" svg:y="3.685cm" presentation:class="outline" presentation:user-transformed="true">
          <draw:text-box>
            <text:list text:style-name="L2">
              <text:list-item>
                <text:p>Remember the <text:a xlink:href="https://gymnasium.farama.org/environments/toy_text/taxi/" xlink:type="simple">Taxi-v3</text:a><text:s/>and <text:a xlink:href="https://gymnasium.farama.org/environments/toy_text/frozen_lake/" xlink:type="simple">FrozenLake-v1</text:a><text:s/>environment in <text:a xlink:href="https://gymnasium.farama.org/" xlink:type="simple">OpenAI Gymnasium</text:a>:</text:p>
                <text:p/>
              </text:list-item>
              <text:list-item>
                <text:p><text:span text:style-name="T3">Task</text:span></text:p>
                <text:list>
                  <text:list-item>
                    <text:p>Implement a Q-Learning agent and a SARSA agent for these environments</text:p>
                  </text:list-item>
                  <text:list-item>
                    <text:p text:style-name="P11">Create the <text:span text:style-name="T3">reward per training epoch</text:span> plot for both <text:span text:style-name="T3">Q-Learning</text:span> and <text:span text:style-name="T3">SARSA </text:span></text:p>
                    <text:list>
                      <text:list-item>
                        <text:p><text:span text:style-name="T6">Plot the reward evolution for Q-Learning and SARSA </text:span><text:span text:style-name="T80">on the same diagram</text:span></text:p>
                      </text:list-item>
                      <text:list-item>
                        <text:p><text:span text:style-name="T6">Every X (e.g. 50, 100) epochs do an </text:span><text:span text:style-name="T80">evaluation run</text:span><text:span text:style-name="T6"> (run the </text:span><text:span text:style-name="T5">currently learned policy</text:span><text:span text:style-name="T6"> for 50 epochs and report the </text:span><text:span text:style-name="T5">average reward</text:span><text:span text:style-name="T6">)</text:span><text:span text:style-name="T5"> </text:span></text:p>
                      </text:list-item>
                    </text:list>
                  </text:list-item>
                  <text:list-item>
                    <text:p><text:span text:style-name="T6">Compare the convergence speed and highest reward metrics of each algorithm under </text:span><text:span text:style-name="T80">different hyperparameter settings (see next slid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OpenAI Gym Environments</text:p>
          </draw:text-box>
        </draw:frame>
        <draw:frame presentation:style-name="pr4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<text:span text:style-name="T3">Task (details)</text:span></text:p>
                <text:list>
                  <text:list-item>
                    <text:p><text:span text:style-name="T80">Vary the main parameters influencing learning:</text:span></text:p>
                    <text:list>
                      <text:list-item>
                        <text:p text:style-name="P10"><text:span text:style-name="T81">γ – 0.5, 0.9</text:span></text:p>
                      </text:list-item>
                      <text:list-item>
                        <text:p text:style-name="P10"><text:span text:style-name="T11">ε – 0.1, 0.5, 0.8</text:span></text:p>
                      </text:list-item>
                      <text:list-item>
                        <text:p text:style-name="P10"><text:span text:style-name="T12">α (lr) – 0.1, 0.5, 0.9</text:span></text:p>
                      </text:list-item>
                    </text:list>
                    <text:p><text:span text:style-name="T28"/></text:p>
                  </text:list-item>
                  <text:list-item>
                    <text:p><text:span text:style-name="T82">Analyse the results by:</text:span></text:p>
                    <text:list>
                      <text:list-item>
                        <text:p><text:span text:style-name="T28">Keeping two parameters constant </text:span><text:span text:style-name="T12">(e.g.</text:span><text:span text:style-name="T28"> </text:span><text:span text:style-name="T81">γ=0.9, </text:span><text:span text:style-name="T11">ε – 0.1) and </text:span><text:span text:style-name="T83">varying the third; </text:span></text:p>
                      </text:list-item>
                      <text:list-item>
                        <text:p><text:span text:style-name="T83">plot all variations of a parameter on the same graph </text:span><text:span text:style-name="T11">(e.g. all variations of </text:span><text:span text:style-name="T28">α</text:span><text:span text:style-name="T12"> are displayed on the same graph to better observe the influence of that single parameter</text:span><text:span text:style-name="T11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Sans" svg:font-family="'Fira Sans'" style:font-adornments="Regular" style:font-family-generic="swiss" style:font-pitch="variable"/>
    <style:font-face style:name="Fira Sans Light" svg:font-family="'Fira Sans Light'" style:font-family-generic="swiss"/>
    <style:font-face style:name="Fira Sans Light1" svg:font-family="'Fira Sans Light'" style:font-adornments="Regular" style:font-family-generic="swiss"/>
    <style:font-face style:name="Fira Sans1" svg:font-family="'Fira Sans'" style:font-adornments="ExtraLight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background" style:display-name="file:///home/sb17498/.config/libreoffice/4/user/template/MetropolisTemplate.otp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-backgroundobjects" style:display-name="file:///home/sb17498/.config/libreoffice/4/user/template/MetropolisTemplate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-notes" style:display-name="file:///home/sb17498/.config/libreoffice/4/user/template/MetropolisTemplate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1" style:display-name="file:///home/sb17498/.config/libreoffice/4/user/template/MetropolisTemplate.otp-outline1" style:family="presentation">
      <style:graphic-properties draw:stroke="none" draw:fill="none" draw:auto-grow-height="false" draw:fit-to-size="false" style:shrink-to-fit="true">
        <text:list-style style:name="file_3a__2f__2f__2f_home_2f_sb17498_2f_.config_2f_libreoffice_2f_4_2f_user_2f_template_2f_MetropolisTemplate.otp-outline1" style:display-name="file:///home/sb17498/.config/libreoffice/4/user/template/MetropolisTemplate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76cm" fo:text-indent="0cm"/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16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2" style:display-name="file:///home/sb17498/.config/libreoffice/4/user/template/MetropolisTemplate.otp-outline2" style:family="presentation" style:parent-style-name="file_3a__2f__2f__2f_home_2f_sb17498_2f_.config_2f_libreoffice_2f_4_2f_user_2f_template_2f_MetropolisTemplate.otp-outline1">
      <style:paragraph-properties fo:margin-left="0cm" fo:margin-right="0cm" fo:margin-top="0cm" fo:margin-bottom="0.299cm" fo:text-indent="0cm"/>
      <style:text-properties fo:font-size="15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-outline3" style:display-name="file:///home/sb17498/.config/libreoffice/4/user/template/MetropolisTemplate.otp-outline3" style:family="presentation" style:parent-style-name="file_3a__2f__2f__2f_home_2f_sb17498_2f_.config_2f_libreoffice_2f_4_2f_user_2f_template_2f_MetropolisTemplate.otp-outline2">
      <style:paragraph-properties fo:margin-left="0cm" fo:margin-right="0cm" fo:margin-top="0cm" fo:margin-bottom="0.224cm" fo:text-indent="0cm"/>
      <style:text-properties fo:font-size="14.1999998092651pt" style:font-size-asian="19pt" style:font-weight-asian="normal" style:font-size-complex="19pt"/>
    </style:style>
    <style:style style:name="file_3a__2f__2f__2f_home_2f_sb17498_2f_.config_2f_libreoffice_2f_4_2f_user_2f_template_2f_MetropolisTemplate.otp-outline4" style:display-name="file:///home/sb17498/.config/libreoffice/4/user/template/MetropolisTemplate.otp-outline4" style:family="presentation" style:parent-style-name="file_3a__2f__2f__2f_home_2f_sb17498_2f_.config_2f_libreoffice_2f_4_2f_user_2f_template_2f_MetropolisTemplate.otp-outline3">
      <style:paragraph-properties fo:margin-left="0cm" fo:margin-right="0cm" fo:margin-top="0cm" fo:margin-bottom="0.15cm" fo:text-indent="0cm"/>
      <style:text-properties fo:font-size="12.8000001907349pt" style:font-size-asian="17pt" style:font-size-complex="17pt"/>
    </style:style>
    <style:style style:name="file_3a__2f__2f__2f_home_2f_sb17498_2f_.config_2f_libreoffice_2f_4_2f_user_2f_template_2f_MetropolisTemplate.otp-outline5" style:display-name="file:///home/sb17498/.config/libreoffice/4/user/template/MetropolisTemplate.otp-outline5" style:family="presentation" style:parent-style-name="file_3a__2f__2f__2f_home_2f_sb17498_2f_.config_2f_libreoffice_2f_4_2f_user_2f_template_2f_MetropolisTemplate.otp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file_3a__2f__2f__2f_home_2f_sb17498_2f_.config_2f_libreoffice_2f_4_2f_user_2f_template_2f_MetropolisTemplate.otp-outline6" style:display-name="file:///home/sb17498/.config/libreoffice/4/user/template/MetropolisTemplate.otp-outline6" style:family="presentation" style:parent-style-name="file_3a__2f__2f__2f_home_2f_sb17498_2f_.config_2f_libreoffice_2f_4_2f_user_2f_template_2f_MetropolisTemplate.otp-outline5">
      <style:paragraph-properties fo:margin-left="0cm" fo:margin-right="0cm" fo:margin-top="0cm" fo:margin-bottom="0.074cm" fo:text-indent="0cm"/>
      <style:text-properties fo:font-size="11.1999998092651pt" style:font-size-asian="15pt" style:font-size-complex="15pt"/>
    </style:style>
    <style:style style:name="file_3a__2f__2f__2f_home_2f_sb17498_2f_.config_2f_libreoffice_2f_4_2f_user_2f_template_2f_MetropolisTemplate.otp-outline7" style:display-name="file:///home/sb17498/.config/libreoffice/4/user/template/MetropolisTemplate.otp-outline7" style:family="presentation" style:parent-style-name="file_3a__2f__2f__2f_home_2f_sb17498_2f_.config_2f_libreoffice_2f_4_2f_user_2f_template_2f_MetropolisTemplate.otp-outline6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file_3a__2f__2f__2f_home_2f_sb17498_2f_.config_2f_libreoffice_2f_4_2f_user_2f_template_2f_MetropolisTemplate.otp-outline8" style:display-name="file:///home/sb17498/.config/libreoffice/4/user/template/MetropolisTemplate.otp-outline8" style:family="presentation" style:parent-style-name="file_3a__2f__2f__2f_home_2f_sb17498_2f_.config_2f_libreoffice_2f_4_2f_user_2f_template_2f_MetropolisTemplate.otp-outline7">
      <style:paragraph-properties fo:margin-left="0cm" fo:margin-right="0cm" fo:margin-top="0cm" fo:margin-bottom="0.074cm" fo:text-indent="0cm"/>
      <style:text-properties fo:font-size="10.5pt" fo:font-weight="normal"/>
    </style:style>
    <style:style style:name="file_3a__2f__2f__2f_home_2f_sb17498_2f_.config_2f_libreoffice_2f_4_2f_user_2f_template_2f_MetropolisTemplate.otp-outline9" style:display-name="file:///home/sb17498/.config/libreoffice/4/user/template/MetropolisTemplate.otp-outline9" style:family="presentation" style:parent-style-name="file_3a__2f__2f__2f_home_2f_sb17498_2f_.config_2f_libreoffice_2f_4_2f_user_2f_template_2f_MetropolisTemplate.otp-outline8">
      <style:paragraph-properties fo:margin-left="0cm" fo:margin-right="0cm" fo:margin-top="0cm" fo:margin-bottom="0.074cm" fo:text-indent="0cm"/>
      <style:text-properties fo:font-size="10.5pt" fo:font-weight="normal"/>
    </style:style>
    <style:style style:name="file_3a__2f__2f__2f_home_2f_sb17498_2f_.config_2f_libreoffice_2f_4_2f_user_2f_template_2f_MetropolisTemplate.otp-subtitle" style:display-name="file:///home/sb17498/.config/libreoffice/4/user/template/MetropolisTemplate.otp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-subtitle" style:display-name="file:///home/sb17498/.config/libreoffice/4/user/template/MetropolisTemplate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title" style:display-name="file:///home/sb17498/.config/libreoffice/4/user/template/MetropolisTemplate.otp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-title" style:display-name="file:///home/sb17498/.config/libreoffice/4/user/template/MetropolisTemplate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Fira Sans1" fo:font-family="'Fira Sans'" style:font-style-name="ExtraLight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background" style:display-name="file:///home/sb17498/.config/libreoffice/4/user/template/MetropolisTemplate.otp_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_5f_-backgroundobjects" style:display-name="file:///home/sb17498/.config/libreoffice/4/user/template/MetropolisTemplate.ot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_5f_-notes" style:display-name="file:///home/sb17498/.config/libreoffice/4/user/template/MetropolisTemplate.ot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1" style:display-name="file:///home/sb17498/.config/libreoffice/4/user/template/MetropolisTemplate.otp_-outline1" style:family="presentation">
      <style:graphic-properties draw:stroke="none" draw:fill="none" draw:auto-grow-height="false" draw:fit-to-size="false" style:shrink-to-fit="true">
        <text:list-style style:name="file_3a__2f__2f__2f_home_2f_sb17498_2f_.config_2f_libreoffice_2f_4_2f_user_2f_template_2f_MetropolisTemplate.otp_5f_-outline1" style:display-name="file:///home/sb17498/.config/libreoffice/4/user/template/MetropolisTemplate.ot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76cm" fo:text-indent="0cm"/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16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2" style:display-name="file:///home/sb17498/.config/libreoffice/4/user/template/MetropolisTemplate.otp_-outline2" style:family="presentation" style:parent-style-name="file_3a__2f__2f__2f_home_2f_sb17498_2f_.config_2f_libreoffice_2f_4_2f_user_2f_template_2f_MetropolisTemplate.otp_5f_-outline1">
      <style:paragraph-properties fo:margin-left="0cm" fo:margin-right="0cm" fo:margin-top="0cm" fo:margin-bottom="0.299cm" fo:text-indent="0cm"/>
      <style:text-properties fo:font-size="15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_5f_-outline3" style:display-name="file:///home/sb17498/.config/libreoffice/4/user/template/MetropolisTemplate.otp_-outline3" style:family="presentation" style:parent-style-name="file_3a__2f__2f__2f_home_2f_sb17498_2f_.config_2f_libreoffice_2f_4_2f_user_2f_template_2f_MetropolisTemplate.otp_5f_-outline2">
      <style:paragraph-properties fo:margin-left="0cm" fo:margin-right="0cm" fo:margin-top="0cm" fo:margin-bottom="0.224cm" fo:text-indent="0cm"/>
      <style:text-properties fo:font-size="14.1999998092651pt" style:font-size-asian="19pt" style:font-weight-asian="normal" style:font-size-complex="19pt"/>
    </style:style>
    <style:style style:name="file_3a__2f__2f__2f_home_2f_sb17498_2f_.config_2f_libreoffice_2f_4_2f_user_2f_template_2f_MetropolisTemplate.otp_5f_-outline4" style:display-name="file:///home/sb17498/.config/libreoffice/4/user/template/MetropolisTemplate.otp_-outline4" style:family="presentation" style:parent-style-name="file_3a__2f__2f__2f_home_2f_sb17498_2f_.config_2f_libreoffice_2f_4_2f_user_2f_template_2f_MetropolisTemplate.otp_5f_-outline3">
      <style:paragraph-properties fo:margin-left="0cm" fo:margin-right="0cm" fo:margin-top="0cm" fo:margin-bottom="0.15cm" fo:text-indent="0cm"/>
      <style:text-properties fo:font-size="12.8000001907349pt" style:font-size-asian="17pt" style:font-size-complex="17pt"/>
    </style:style>
    <style:style style:name="file_3a__2f__2f__2f_home_2f_sb17498_2f_.config_2f_libreoffice_2f_4_2f_user_2f_template_2f_MetropolisTemplate.otp_5f_-outline5" style:display-name="file:///home/sb17498/.config/libreoffice/4/user/template/MetropolisTemplate.otp_-outline5" style:family="presentation" style:parent-style-name="file_3a__2f__2f__2f_home_2f_sb17498_2f_.config_2f_libreoffice_2f_4_2f_user_2f_template_2f_MetropolisTemplate.otp_5f_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file_3a__2f__2f__2f_home_2f_sb17498_2f_.config_2f_libreoffice_2f_4_2f_user_2f_template_2f_MetropolisTemplate.otp_5f_-outline6" style:display-name="file:///home/sb17498/.config/libreoffice/4/user/template/MetropolisTemplate.otp_-outline6" style:family="presentation" style:parent-style-name="file_3a__2f__2f__2f_home_2f_sb17498_2f_.config_2f_libreoffice_2f_4_2f_user_2f_template_2f_MetropolisTemplate.otp_5f_-outline5">
      <style:paragraph-properties fo:margin-left="0cm" fo:margin-right="0cm" fo:margin-top="0cm" fo:margin-bottom="0.074cm" fo:text-indent="0cm"/>
      <style:text-properties fo:font-size="11.1999998092651pt" style:font-size-asian="15pt" style:font-size-complex="15pt"/>
    </style:style>
    <style:style style:name="file_3a__2f__2f__2f_home_2f_sb17498_2f_.config_2f_libreoffice_2f_4_2f_user_2f_template_2f_MetropolisTemplate.otp_5f_-outline7" style:display-name="file:///home/sb17498/.config/libreoffice/4/user/template/MetropolisTemplate.otp_-outline7" style:family="presentation" style:parent-style-name="file_3a__2f__2f__2f_home_2f_sb17498_2f_.config_2f_libreoffice_2f_4_2f_user_2f_template_2f_MetropolisTemplate.otp_5f_-outline6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file_3a__2f__2f__2f_home_2f_sb17498_2f_.config_2f_libreoffice_2f_4_2f_user_2f_template_2f_MetropolisTemplate.otp_5f_-outline8" style:display-name="file:///home/sb17498/.config/libreoffice/4/user/template/MetropolisTemplate.otp_-outline8" style:family="presentation" style:parent-style-name="file_3a__2f__2f__2f_home_2f_sb17498_2f_.config_2f_libreoffice_2f_4_2f_user_2f_template_2f_MetropolisTemplate.otp_5f_-outline7">
      <style:paragraph-properties fo:margin-left="0cm" fo:margin-right="0cm" fo:margin-top="0cm" fo:margin-bottom="0.074cm" fo:text-indent="0cm"/>
      <style:text-properties fo:font-size="10.5pt" fo:font-weight="normal"/>
    </style:style>
    <style:style style:name="file_3a__2f__2f__2f_home_2f_sb17498_2f_.config_2f_libreoffice_2f_4_2f_user_2f_template_2f_MetropolisTemplate.otp_5f_-outline9" style:display-name="file:///home/sb17498/.config/libreoffice/4/user/template/MetropolisTemplate.otp_-outline9" style:family="presentation" style:parent-style-name="file_3a__2f__2f__2f_home_2f_sb17498_2f_.config_2f_libreoffice_2f_4_2f_user_2f_template_2f_MetropolisTemplate.otp_5f_-outline8">
      <style:paragraph-properties fo:margin-left="0cm" fo:margin-right="0cm" fo:margin-top="0cm" fo:margin-bottom="0.074cm" fo:text-indent="0cm"/>
      <style:text-properties fo:font-size="10.5pt" fo:font-weight="normal"/>
    </style:style>
    <style:style style:name="file_3a__2f__2f__2f_home_2f_sb17498_2f_.config_2f_libreoffice_2f_4_2f_user_2f_template_2f_MetropolisTemplate.otp_5f_-subtitle" style:display-name="file:///home/sb17498/.config/libreoffice/4/user/template/MetropolisTemplate.otp_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_5f_-subtitle" style:display-name="file:///home/sb17498/.config/libreoffice/4/user/template/MetropolisTemplate.ot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title" style:display-name="file:///home/sb17498/.config/libreoffice/4/user/template/MetropolisTemplate.otp_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_5f_-title" style:display-name="file:///home/sb17498/.config/libreoffice/4/user/template/MetropolisTemplate.ot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Fira Sans1" fo:font-family="'Fira Sans'" style:font-style-name="ExtraLight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 loext:decorative="fals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 loext:decorative="false"/>
    </style:style>
    <style:style style:name="Mgr5" style:family="graphic" style:parent-style-name="standard">
      <style:graphic-properties svg:stroke-width="0.15cm" svg:stroke-color="#ff6600" draw:marker-start-width="0.655cm" draw:marker-end-width="0.655cm" draw:fill="none" draw:fill-color="#ff6600" fo:padding-top="0.075cm" fo:padding-bottom="0.075cm" fo:padding-left="0.075cm" fo:padding-right="0.075cm" loext:decorative="false"/>
    </style:style>
    <style:style style:name="Mgr6" style:family="graphic" style:parent-style-name="standard">
      <style:graphic-properties draw:stroke="none" svg:stroke-color="#ff6600" draw:fill-color="#003333" loext:decorative="false"/>
    </style:style>
    <style:style style:name="Mgr7" style:family="graphic" style:parent-style-name="standard">
      <style:graphic-properties draw:stroke="none" draw:fill-color="#003333" draw:textarea-vertical-align="middle" draw:auto-grow-height="false" fo:min-height="0.425cm" fo:min-width="27.5cm" loext:decorative="false"/>
    </style:style>
    <style:style style:name="Mgr8" style:family="graphic" style:parent-style-name="standard">
      <style:graphic-properties draw:stroke="none" draw:fill="none" draw:fill-color="#ffffff" fo:min-height="8.884cm" loext:decorative="fals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 loext:decorative="fals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 loext:decorative="false"/>
    </style:style>
    <style:style style:name="Mpr3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 loext:decorative="false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0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/>
    </style:style>
    <style:style style:name="MP12" style:family="paragraph">
      <loext:graphic-properties draw:fill="none" draw:fill-color="#ffffff"/>
      <style:text-properties style:use-window-font-color="true" loext:opacity="0%" fo:font-size="14pt"/>
    </style:style>
    <style:style style:name="MP13" style:family="paragraph">
      <style:paragraph-properties fo:text-align="end"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5" style:family="paragraph">
      <style:paragraph-properties style:writing-mode="lr-tb"/>
      <style:text-properties fo:color="#000000" loext:opacity="100%" fo:font-size="14pt"/>
    </style:style>
    <style:style style:name="MP16" style:family="paragraph">
      <loext:graphic-properties draw:fill="none" draw:fill-color="#ffffff"/>
      <style:text-properties fo:color="#000000" loext:opacity="100%" fo:font-size="14pt"/>
    </style:style>
    <style:style style:name="MP17" style:family="paragraph">
      <style:paragraph-properties fo:text-align="end" style:writing-mode="lr-tb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6600"/>
    </style:style>
    <style:style style:name="MP21" style:family="paragraph">
      <loext:graphic-properties draw:fill-color="#003333"/>
    </style:style>
    <style:style style:name="MP22" style:family="paragraph">
      <loext:graphic-properties draw:fill-color="#003333"/>
      <style:paragraph-properties fo:text-align="center"/>
    </style:style>
    <style:style style:name="MP23" style:family="paragraph">
      <loext:graphic-properties draw:fill="none" draw:fill-color="#ffffff"/>
    </style:style>
    <style:style style:name="MP24" style:family="paragraph">
      <style:paragraph-properties style:writing-mode="lr-tb"/>
      <style:text-properties fo:color="#ffffff" loext:opacity="100%" style:font-name="Fira Sans" fo:font-size="14pt" fo:font-weight="normal" style:font-size-asian="14pt" style:font-size-complex="14pt"/>
    </style:style>
    <style:style style:name="MP25" style:family="paragraph">
      <loext:graphic-properties draw:fill="none" draw:fill-color="#ffffff"/>
      <style:text-properties fo:color="#ffffff" loext:opacity="100%" style:font-name="Fira Sans" fo:font-size="14pt" fo:font-weight="normal" style:font-size-asian="14pt" style:font-size-complex="14pt"/>
    </style:style>
    <style:style style:name="MP26" style:family="paragraph">
      <style:paragraph-properties fo:text-align="end" style:writing-mode="lr-tb"/>
      <style:text-properties fo:color="#ffffff" loext:opacity="100%" style:font-name="Fira Sans Light" fo:font-size="14pt" fo:font-weight="normal" style:font-size-asian="14pt" style:font-size-complex="14pt"/>
    </style:style>
    <style:style style:name="MP27" style:family="paragraph">
      <loext:graphic-properties draw:fill="none" draw:fill-color="#ffffff"/>
      <style:paragraph-properties fo:text-align="end"/>
      <style:text-properties fo:color="#ffffff" loext:opacity="100%" style:font-name="Fira Sans Light" fo:font-size="14pt" fo:font-weight="normal" style:font-size-asian="14pt" style:font-size-complex="14pt"/>
    </style:style>
    <style:style style:name="MP28" style:family="paragraph">
      <style:paragraph-properties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text-properties fo:font-size="14pt" style:font-size-asian="14pt" style:font-size-complex="14pt"/>
    </style:style>
    <style:style style:name="MP30" style:family="paragraph">
      <style:paragraph-properties fo:text-align="end" style:writing-mode="lr-tb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style:style style:name="MT4" style:family="text">
      <style:text-properties fo:color="#ffffff" loext:opacity="100%" style:font-name="Fira San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loext:opacity="100%" style:font-name="Fira Sans Light" fo:font-size="14pt" fo:font-style="italic" fo:font-weight="normal" style:font-size-asian="14pt" style:font-style-asian="italic" style:font-size-complex="14pt" style:font-style-complex="italic"/>
    </style:style>
    <style:style style:name="MT6" style:family="text">
      <style:text-properties fo:color="#ffffff" loext:opacity="100%" style:font-name="Fira Sans Light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loext:opacity="100%" style:font-name="Fira Sans Light" fo:font-size="14pt" fo:font-weight="normal" style:font-size-asian="14pt" style:font-size-complex="14pt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" style:display-name="file:///home/sb17498/.config/libreoffice/4/user/template/MetropolisTemplate.otp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line draw:style-name="Mgr5" draw:text-style-name="MP20" draw:layer="backgroundobjects" svg:x1="0cm" svg:y1="15.074cm" svg:x2="28cm" svg:y2="15.074cm">
        <text:p/>
      </draw:line>
      <draw:line draw:style-name="Mgr5" draw:text-style-name="MP20" draw:layer="backgroundobjects" svg:x1="0cm" svg:y1="1.922cm" svg:x2="28cm" svg:y2="1.922cm">
        <text:p/>
      </draw:line>
      <draw:rect draw:style-name="Mgr6" draw:text-style-name="MP21" draw:layer="backgroundobjects" svg:width="28cm" svg:height="1.922cm" svg:x="0cm" svg:y="0cm">
        <text:p/>
      </draw:rect>
      <draw:custom-shape draw:style-name="Mgr7" draw:text-style-name="MP22" draw:layer="backgroundobjects" svg:width="28cm" svg:height="0.675cm" svg:x="0cm" svg:y="15.07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-title" draw:layer="backgroundobjects" svg:width="22.5cm" svg:height="1.922cm" svg:x="0cm" svg:y="0cm" presentation:class="title" presentation:placeholder="true">
        <draw:text-box/>
      </draw:frame>
      <draw:frame draw:style-name="Mgr8" draw:text-style-name="MP23" draw:layer="backgroundobjects" svg:width="25.199cm" svg:height="9.134cm" svg:x="1.4cm" svg:y="3.685cm">
        <draw:text-box>
          <text:p/>
        </draw:text-box>
      </draw:frame>
      <draw:frame presentation:style-name="Mpr16" draw:text-style-name="MP25" draw:layer="backgroundobjects" svg:width="21.7cm" svg:height="0.427cm" svg:x="0.6cm" svg:y="15.173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6" draw:text-style-name="MP27" draw:layer="backgroundobjects" svg:width="3.799cm" svg:height="0.427cm" svg:x="23.8cm" svg:y="15.173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17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18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18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_5f_" style:display-name="file:///home/sb17498/.config/libreoffice/4/user/template/MetropolisTemplate.otp_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line draw:style-name="Mgr5" draw:text-style-name="MP20" draw:layer="backgroundobjects" svg:x1="0cm" svg:y1="15.074cm" svg:x2="28cm" svg:y2="15.074cm">
        <text:p/>
      </draw:line>
      <draw:line draw:style-name="Mgr5" draw:text-style-name="MP20" draw:layer="backgroundobjects" svg:x1="0cm" svg:y1="1.922cm" svg:x2="28cm" svg:y2="1.922cm">
        <text:p/>
      </draw:line>
      <draw:rect draw:style-name="Mgr6" draw:text-style-name="MP21" draw:layer="backgroundobjects" svg:width="28cm" svg:height="1.922cm" svg:x="0cm" svg:y="0cm">
        <text:p/>
      </draw:rect>
      <draw:custom-shape draw:style-name="Mgr7" draw:text-style-name="MP22" draw:layer="backgroundobjects" svg:width="28cm" svg:height="0.675cm" svg:x="0cm" svg:y="15.07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_5f_-title" draw:layer="backgroundobjects" svg:width="22.5cm" svg:height="1.922cm" svg:x="0cm" svg:y="0cm" presentation:class="title" presentation:placeholder="true">
        <draw:text-box/>
      </draw:frame>
      <draw:frame draw:style-name="Mgr8" draw:text-style-name="MP23" draw:layer="backgroundobjects" svg:width="25.199cm" svg:height="9.134cm" svg:x="1.4cm" svg:y="3.685cm">
        <draw:text-box>
          <text:p/>
        </draw:text-box>
      </draw:frame>
      <draw:frame presentation:style-name="Mpr19" draw:text-style-name="MP25" draw:layer="backgroundobjects" svg:width="21.7cm" svg:height="0.427cm" svg:x="0.6cm" svg:y="15.173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9" draw:text-style-name="MP27" draw:layer="backgroundobjects" svg:width="3.799cm" svg:height="0.427cm" svg:x="23.8cm" svg:y="15.173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_5f_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20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21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21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29T14:56:05.297435605</meta:creation-date>
    <meta:editing-duration>P1DT5H31M26S</meta:editing-duration>
    <meta:editing-cycles>72</meta:editing-cycles>
    <meta:generator>LibreOffice/24.2.7.2$Linux_X86_64 LibreOffice_project/420$Build-2</meta:generator>
    <dc:title>Midnightblue</dc:title>
    <meta:initial-creator>Alexandru Sorici</meta:initial-creator>
    <dc:date>2026-03-25T14:07:03.858944144</dc:date>
    <dc:creator>Alexandru Sorici</dc:creator>
    <meta:print-date>2026-03-25T14:06:41.116665614</meta:print-date>
    <meta:printed-by>PDF files: Alexandru Sorici</meta:printed-by>
    <meta:document-statistic meta:object-count="130"/>
  </office:meta>
</office:document-meta>
</file>

<file path=Object 1/content.xml><?xml version="1.0" encoding="utf-8"?>
<math xmlns="http://www.w3.org/1998/Math/MathML" display="block">
  <semantics>
    <mrow>
      <msup>
        <mi>q</mi>
        <mi>π</mi>
      </msup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sub>
          <mi>E</mi>
          <mi>π</mi>
        </msub>
      </mrow>
      <mrow>
        <mrow>
          <mo fence="true" stretchy="false">[</mo>
          <mrow>
            <mrow>
              <mrow>
                <msub>
                  <mi>R</mi>
                  <mrow>
                    <mi>t</mi>
                    <mo stretchy="false">+</mo>
                    <mn>1</mn>
                  </mrow>
                </msub>
                <mo stretchy="false">+</mo>
                <mi>γ</mi>
              </mrow>
              <mrow>
                <msub>
                  <mi>R</mi>
                  <mrow>
                    <mi>t</mi>
                    <mo stretchy="false">+</mo>
                    <mn>2</mn>
                  </mrow>
                </msub>
                <mo stretchy="false">+</mo>
                <msup>
                  <mi>γ</mi>
                  <mn>2</mn>
                </msup>
              </mrow>
              <mrow>
                <mrow>
                  <msub>
                    <mi>R</mi>
                    <mrow>
                      <mi>t</mi>
                      <mo stretchy="false">+</mo>
                      <mn>3</mn>
                    </mrow>
                  </msub>
                  <mo stretchy="false">+</mo>
                  <mn>...</mn>
                </mrow>
                <mo stretchy="false">∣</mo>
                <msub>
                  <mi>S</mi>
                  <mi>t</mi>
                </msub>
                <mo stretchy="false">=</mo>
                <mi>s</mi>
              </mrow>
              <mi>,</mi>
              <mrow>
                <msub>
                  <mi>A</mi>
                  <mi>t</mi>
                </msub>
                <mo stretchy="false">=</mo>
                <mi>a</mi>
              </mrow>
            </mrow>
          </mrow>
          <mo fence="true" stretchy="false">]</mo>
        </mrow>
        <mo stretchy="false">=</mo>
        <msub>
          <mi>E</mi>
          <mi>π</mi>
        </msub>
      </mrow>
      <mrow>
        <mo fence="true" stretchy="true">[</mo>
        <mrow>
          <mrow>
            <mrow>
              <mrow>
                <munder>
                  <mo stretchy="false">∑</mo>
                  <mrow>
                    <mi>τ</mi>
                    <mo stretchy="false">=</mo>
                    <mrow>
                      <mi>t</mi>
                      <mo stretchy="false">+</mo>
                      <mn>1</mn>
                    </mrow>
                  </mrow>
                </munder>
                <mrow>
                  <msup>
                    <mi>γ</mi>
                    <mrow>
                      <mi>τ</mi>
                      <mo stretchy="false">−</mo>
                      <mi>t</mi>
                      <mo stretchy="false">−</mo>
                      <mn>1</mn>
                    </mrow>
                  </msup>
                  <msub>
                    <mi>R</mi>
                    <mi>τ</mi>
                  </msub>
                </mrow>
              </mrow>
              <mo stretchy="false">∣</mo>
              <msub>
                <mi>S</mi>
                <mi>t</mi>
              </msub>
              <mo stretchy="false">=</mo>
              <mi>s</mi>
            </mrow>
            <mi>,</mi>
            <mrow>
              <msub>
                <mi>A</mi>
                <mi>t</mi>
              </msub>
              <mo stretchy="false">=</mo>
              <mi>a</mi>
            </mrow>
          </mrow>
        </mrow>
        <mo fence="true" stretchy="true">]</mo>
      </mrow>
    </mrow>
    <annotation encoding="StarMath 5.0">q^{%pi}(s,a) = E_{%pi} { [ R_{t+1} + %gamma R_{t+2} + %gamma^2 R_{t+3} + ... divides S_t = s, A_t = a]} = E_{%pi} left [ sum from {%tau = t + 1} {%gamma^{%tau - t - 1} R_%tau} divides  S_t = s, A_t = a right ] 
</annotation>
  </semantics>
</math>
</file>

<file path=Object 2/content.xml><?xml version="1.0" encoding="utf-8"?>
<math xmlns="http://www.w3.org/1998/Math/MathML" display="block">
  <semantics>
    <mrow>
      <msup>
        <mi>q</mi>
        <mi>π</mi>
      </msup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sub>
          <mi>E</mi>
          <mi>π</mi>
        </msub>
      </mrow>
      <mrow>
        <mrow>
          <mo fence="true" stretchy="false">[</mo>
          <mrow>
            <mrow>
              <mrow>
                <msub>
                  <mi>R</mi>
                  <mrow>
                    <mi>t</mi>
                    <mo stretchy="false">+</mo>
                    <mn>1</mn>
                  </mrow>
                </msub>
                <mo stretchy="false">+</mo>
                <mi>γ</mi>
              </mrow>
              <msup>
                <mi>q</mi>
                <mi>π</mi>
              </msup>
              <mrow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n>1</mn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n>1</mn>
                        </mrow>
                      </msub>
                    </mrow>
                  </mrow>
                  <mo fence="true" stretchy="false">)</mo>
                </mrow>
                <mo stretchy="false">∣</mo>
                <msub>
                  <mi>S</mi>
                  <mi>t</mi>
                </msub>
                <mo stretchy="false">=</mo>
                <mi>s</mi>
              </mrow>
              <mi>,</mi>
              <mrow>
                <msub>
                  <mi>A</mi>
                  <mi>t</mi>
                </msub>
                <mo stretchy="false">=</mo>
                <mi>a</mi>
              </mrow>
            </mrow>
          </mrow>
          <mo fence="true" stretchy="false">]</mo>
        </mrow>
        <mo stretchy="false">=</mo>
        <mrow>
          <munder>
            <mo stretchy="false">∑</mo>
            <mrow>
              <mi>s</mi>
              <mrow>
                <mi>'</mi>
                <mo stretchy="false">∈</mo>
                <mi>S</mi>
              </mrow>
            </mrow>
          </munder>
          <mrow>
            <munder>
              <mo stretchy="false">∑</mo>
              <mrow>
                <mi>r</mi>
                <mo stretchy="false">∈</mo>
                <mi>R</mi>
              </mrow>
            </munder>
            <mrow>
              <mi>p</mi>
              <mrow>
                <mo fence="true" stretchy="false">(</mo>
                <mrow>
                  <mrow>
                    <mi>s</mi>
                    <mi>'</mi>
                    <mi>,</mi>
                    <mrow>
                      <mi>r</mi>
                      <mo stretchy="false">∣</mo>
                      <mi>s</mi>
                    </mrow>
                    <mi>,</mi>
                    <mi>a</mi>
                  </mrow>
                </mrow>
                <mo fence="true" stretchy="false">)</mo>
              </mrow>
              <mrow>
                <mo fence="true" stretchy="false">[</mo>
                <mrow>
                  <mrow>
                    <mrow>
                      <mi>r</mi>
                      <mo stretchy="false">+</mo>
                      <mi>γ</mi>
                    </mrow>
                    <msup>
                      <mi>q</mi>
                      <mi>π</mi>
                    </msup>
                    <mrow>
                      <mo fence="true" stretchy="false">(</mo>
                      <mrow>
                        <mrow>
                          <mi>s</mi>
                          <mi>'</mi>
                          <mi>,</mi>
                          <mi>π</mi>
                          <mrow>
                            <mo fence="true" stretchy="false">(</mo>
                            <mrow>
                              <mrow>
                                <mi>s</mi>
                                <mi>'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row>
      </mrow>
    </mrow>
    <annotation encoding="StarMath 5.0">q^{%pi}(s,a) =  E_%pi { [ R_{t+1} + %gamma q^{%pi}(S_{t+1}, A_{t+1}) divides S_t = s, A_t = a]} = sum from { s' in S } { sum from {r in R} {p(s', r divides s, a) [r + %gamma q^{%pi}(s', %pi(s'))]} }
</annotation>
  </semantics>
</math>
</file>

<file path=Object 3/content.xml><?xml version="1.0" encoding="utf-8"?>
<math xmlns="http://www.w3.org/1998/Math/MathML" display="block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4/content.xml><?xml version="1.0" encoding="utf-8"?>
<math xmlns="http://www.w3.org/1998/Math/MathML" display="block">
  <semantics>
    <mrow>
      <msup>
        <mi>V</mi>
        <mtext>*</mtext>
      </msup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under>
          <mi mathvariant="italic">max</mi>
          <mi>a</mi>
        </munder>
      </mrow>
      <mrow>
        <mo fence="true" form="prefix" stretchy="false">[</mo>
        <mrow>
          <mrow>
            <mi>R</mi>
            <mrow>
              <mrow>
                <mo fence="true" form="prefix" stretchy="false">(</mo>
                <mrow>
                  <mrow>
                    <mi>s</mi>
                    <mi>,</mi>
                    <mi>a</mi>
                  </mrow>
                </mrow>
                <mo fence="true" form="postfix" stretchy="false">)</mo>
              </mrow>
              <mo stretchy="false">+</mo>
              <mi>γ</mi>
            </mrow>
            <mrow>
              <munder>
                <mo stretchy="false">∑</mo>
                <mrow>
                  <mi>s</mi>
                  <mi>'</mi>
                </mrow>
              </munder>
              <mi>P</mi>
            </mrow>
            <mrow>
              <mo fence="true" form="prefix" stretchy="false">(</mo>
              <mrow>
                <mrow>
                  <mi>s</mi>
                  <mrow>
                    <mi>'</mi>
                    <mo stretchy="false">∣</mo>
                    <mi>s</mi>
                  </mrow>
                  <mi>,</mi>
                  <mi>a</mi>
                </mrow>
              </mrow>
              <mo fence="true" form="postfix" stretchy="false">)</mo>
            </mrow>
            <msup>
              <mi>V</mi>
              <mtext>*</mtext>
            </msup>
            <mrow>
              <mo fence="true" form="prefix" stretchy="false">(</mo>
              <mrow>
                <mrow>
                  <mi>s</mi>
                  <mi>'</mi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V^{"*"}(s) = max csub a { [ R(s,a) + %gamma sum from {s'} P(s' divides s, a) V^{"*"}(s') ]}
</annotation>
  </semantics>
</math>
</file>

<file path=Object 5/content.xml><?xml version="1.0" encoding="utf-8"?>
<math xmlns="http://www.w3.org/1998/Math/MathML" display="block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7/content.xml><?xml version="1.0" encoding="utf-8"?>
<math xmlns="http://www.w3.org/1998/Math/MathML" display="block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8/content.xml><?xml version="1.0" encoding="utf-8"?>
<math xmlns="http://www.w3.org/1998/Math/MathML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9/content.xml><?xml version="1.0" encoding="utf-8"?>
<math xmlns="http://www.w3.org/1998/Math/MathML" display="block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