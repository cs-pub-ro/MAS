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1BA0000012084A218D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adornments="ExtraLight" style:font-family-generic="swiss" style:font-pitch="variable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1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 loext:decorative="false"/>
      <style:paragraph-properties style:writing-mode="lr-tb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 loext:decorative="false"/>
      <style:paragraph-properties style:writing-mode="lr-tb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 loext:decorative="false"/>
      <style:paragraph-properties style:writing-mode="lr-tb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1cm"/>
    </style:style>
    <style:style style:name="P7" style:family="paragraph">
      <style:paragraph-properties fo:text-align="justify"/>
    </style:style>
    <style:style style:name="P8" style:family="paragraph">
      <style:paragraph-properties fo:margin-top="0cm" fo:margin-bottom="0.1cm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369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15pt" style:font-size-asian="16pt" style:font-size-complex="16pt"/>
    </style:style>
    <style:style style:name="T7" style:family="text">
      <style:text-properties fo:font-size="15pt" fo:font-weight="bold" style:font-size-asian="16pt" style:font-weight-asian="bold" style:font-size-complex="16pt" style:font-weight-complex="bold"/>
    </style:style>
    <style:style style:name="T8" style:family="text">
      <style:text-properties fo:color="#996600" loext:opacity="100%" fo:font-size="15pt" fo:font-weight="bold" style:font-size-asian="16pt" style:font-weight-asian="bold" style:font-size-complex="16pt" style:font-weight-complex="bold"/>
    </style:style>
    <style:style style:name="T9" style:family="text">
      <style:text-properties fo:color="#996600" loext:opacity="100%" fo:font-size="15pt" fo:font-weight="normal" style:font-size-asian="16pt" style:font-weight-asian="normal" style:font-size-complex="16pt" style:font-weight-complex="normal"/>
    </style:style>
    <style:style style:name="T10" style:family="text">
      <style:text-properties fo:font-size="15pt" fo:font-weight="normal" style:font-size-asian="16pt" style:font-weight-asian="normal" style:font-size-complex="16pt" style:font-weight-complex="normal"/>
    </style:style>
    <style:style style:name="T11" style:family="text">
      <style:text-properties fo:color="#006633" loext:opacity="100%" fo:font-size="15pt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006633" loext:opacity="100%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633" loext:opacity="100%" style:text-outline="false" style:text-line-through-style="none" style:text-line-through-type="none" style:font-name="Fira Sans Light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" style:font-size-asian="16pt" style:font-weight-asian="bold" style:font-name-complex="Fira Sans Light" style:font-size-complex="1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33" loext:opacity="100%" style:font-name="Fira Sans Light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17" style:family="text">
      <style:text-properties fo:color="#006633" loext:opacity="100%" style:font-name="Fira Sans Light1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18" style:family="text">
      <style:text-properties fo:color="#006633" loext:opacity="100%" style:font-name="Fira Sans Light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19" style:family="text">
      <style:text-properties fo:color="#006633" loext:opacity="100%" style:font-name="Fira Sans Light" fo:font-size="15pt" fo:font-style="normal" fo:font-weight="bold" style:font-name-asian="Fira Sans Light" style:font-size-asian="16pt" style:font-style-asian="normal" style:font-weight-asian="bold" style:font-name-complex="Fira Sans Light" style:font-size-complex="16pt" style:font-style-complex="normal" style:font-weight-complex="bold"/>
    </style:style>
    <style:style style:name="T20" style:family="text">
      <style:text-properties fo:font-variant="normal" fo:text-transform="none" fo:color="#003333" loext:opacity="100%" style:text-outline="false" style:text-line-through-style="none" style:text-line-through-type="none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16pt" fo:font-style="normal" fo:text-shadow="none" style:text-underline-style="none" fo:font-weight="bold" style:letter-kerning="true" style:font-name-asian="Fira Sans Light" style:font-size-asian="18pt" style:font-style-asian="normal" style:font-weight-asian="bold" style:font-name-complex="Fira Sans Light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6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Fira Sans Light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24" style:family="text">
      <style:text-properties fo:font-size="16pt" fo:font-weight="bold" style:font-size-asian="18pt" style:font-weight-asian="bold" style:font-size-complex="18pt" style:font-weight-complex="bold"/>
    </style:style>
    <style:style style:name="T25" style:family="text">
      <style:text-properties fo:font-size="16pt" fo:font-weight="normal" style:font-size-asian="18pt" style:font-weight-asian="normal" style:font-size-complex="18pt" style:font-weight-complex="normal"/>
    </style:style>
    <style:style style:name="T26" style:family="text">
      <style:text-properties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" style:font-size-asian="16pt" style:font-style-asian="normal" style:font-weight-asian="bold" style:font-name-complex="Fira Sans Light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6633" loext:opacity="100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3" style:family="text">
      <style:text-properties style:font-name="Fira Sans Light1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34" style:family="text">
      <style:text-properties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5" style:family="text">
      <style:text-properties style:font-name="Fira Sans Light1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36" style:family="text">
      <style:text-properties fo:color="#996600" loext:opacity="100%" style:font-name="Fira Sans Light1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7" style:family="text">
      <style:text-properties fo:color="#996600" loext:opacity="100%" style:text-position="-33% 58%" style:font-name="Fira Sans Light1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8" style:family="text">
      <style:text-properties fo:color="#996600" loext:opacity="100%" fo:font-size="16pt" fo:font-weight="bold" style:font-size-asian="18pt" style:font-weight-asian="bold" style:font-size-complex="18pt" style:font-weight-complex="bold"/>
    </style:style>
    <style:style style:name="T39" style:family="text">
      <style:text-properties fo:color="#996600" loext:opacity="100%" fo:font-size="16pt" fo:font-weight="normal" style:font-size-asian="18pt" style:font-weight-asian="normal" style:font-size-complex="18pt" style:font-weight-complex="normal"/>
    </style:style>
    <style:style style:name="T40" style:family="text">
      <style:text-properties fo:color="#996600" loext:opacity="100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996600" loext:opacity="100%"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variant="normal" fo:text-transform="none" fo:color="#006633" loext:opacity="100%" style:text-outline="false" style:text-line-through-style="none" style:text-line-through-type="none" style:text-position="-33% 58%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33" loext:opacity="100%" style:text-outline="false" style:text-line-through-style="none" style:text-line-through-type="none" style:text-position="0% 100%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-33% 58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49" style:family="text">
      <style:text-properties style:text-position="0% 100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50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3333" loext:opacity="100%" style:text-outline="false" style:text-line-through-style="none" style:text-line-through-type="none" style:text-position="-33% 58%" style:font-name="Fira Sans Light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style:font-name="Fira Sans Light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54" style:family="text">
      <style:text-properties style:text-position="-33% 58%" style:font-name="Fira Sans Light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55" style:family="text">
      <style:text-properties style:text-position="0% 100%" style:font-name="Fira Sans Light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56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996600" loext:opacity="100%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996600" loext:opacity="100%" style:text-outline="false" style:text-line-through-style="none" style:text-line-through-type="none" style:text-position="-33% 58%" style:font-name="Fira Sans Light1" fo:font-size="15pt" fo:font-style="italic" fo:text-shadow="none" style:text-underline-style="none" fo:font-weight="normal" style:letter-kerning="true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996600" loext:opacity="100%" style:text-position="0% 100%" style:font-name="Fira Sans Light1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1" style:family="text">
      <style:text-properties fo:color="#996600" loext:opacity="100%" style:text-position="0% 100%" style:font-name="Fira Sans Light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2" style:family="text">
      <style:text-properties fo:color="#996600" loext:opacity="100%" style:text-position="-33% 58%" style:font-name="Fira Sans Light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3" style:family="text">
      <style:text-properties style:text-position="-33% 58%" style:font-name="Fira Sans Light1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64" style:family="text">
      <style:text-properties style:font-name="Fira Sans Light" style:font-name-asian="Fira Sans Light" style:font-name-complex="Fira Sans Light"/>
    </style:style>
    <style:style style:name="T65" style:family="text">
      <style:text-properties style:font-name="Fira Sans Light1" style:font-name-asian="Fira Sans Light" style:font-name-complex="Fira Sans Light"/>
    </style:style>
    <style:style style:name="T66" style:family="text">
      <style:text-properties style:font-name="Fira Sans Light1" fo:font-weight="normal" style:font-name-asian="Fira Sans Light" style:font-weight-asian="normal" style:font-name-complex="Fira Sans Light" style:font-weight-complex="normal"/>
    </style:style>
    <style:style style:name="T67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20pt" fo:font-style="normal" fo:text-shadow="none" style:text-underline-style="none" style:letter-kerning="true" style:font-name-asian="WenQuanYi Zen Hei" style:font-size-asian="21pt" style:font-style-asian="normal" style:font-name-complex="FreeSans" style:font-size-complex="21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20pt" fo:font-style="normal" fo:text-shadow="none" style:text-underline-style="none" fo:font-weight="normal" style:letter-kerning="true" style:font-name-asian="WenQuanYi Zen Hei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3333" loext:opacity="100%" style:text-outline="false" style:text-line-through-style="none" style:text-line-through-type="none" style:text-position="-33% 58%" style:font-name="Fira Sans Light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style:text-position="0% 100%" style:font-name="Fira Sans Light1" fo:font-size="20pt" fo:font-style="italic" fo:font-weight="bold" style:font-name-asian="Fira Sans Light" style:font-size-asian="20pt" style:font-style-asian="italic" style:font-weight-asian="bold" style:font-name-complex="Fira Sans Light" style:font-size-complex="20pt" style:font-style-complex="italic" style:font-weight-complex="bold"/>
    </style:style>
    <style:style style:name="T74" style:family="text">
      <style:text-properties style:text-position="0% 100%" style:font-name="Fira Sans Light" fo:font-size="20pt" fo:font-style="italic" fo:font-weight="bold" style:font-name-asian="Fira Sans Light" style:font-size-asian="20pt" style:font-style-asian="italic" style:font-weight-asian="bold" style:font-name-complex="Fira Sans Light" style:font-size-complex="20pt" style:font-style-complex="italic" style:font-weight-complex="bold"/>
    </style:style>
    <style:style style:name="T75" style:family="text">
      <style:text-properties style:text-position="-33% 58%" style:font-name="Fira Sans Light" fo:font-size="20pt" fo:font-style="italic" fo:font-weight="bold" style:font-name-asian="Fira Sans Light" style:font-size-asian="20pt" style:font-style-asian="italic" style:font-weight-asian="bold" style:font-name-complex="Fira Sans Light" style:font-size-complex="20pt" style:font-style-complex="italic" style:font-weight-complex="bold"/>
    </style:style>
    <style:style style:name="T76" style:family="text">
      <style:text-properties style:text-position="0% 100%" style:font-name="Fira Sans Light" fo:font-size="20pt" fo:font-style="normal" fo:font-weight="normal" style:font-name-asian="Fira Sans Light" style:font-size-asian="20pt" style:font-style-asian="normal" style:font-weight-asian="normal" style:font-name-complex="Fira Sans Light" style:font-size-complex="20pt" style:font-style-complex="normal" style:font-weight-complex="normal"/>
    </style:style>
    <style:style style:name="T77" style:family="text">
      <style:text-properties style:text-position="0% 100%" style:font-name="Fira Sans Light" fo:font-size="20pt" fo:font-style="normal" fo:font-weight="bold" style:font-name-asian="Fira Sans Light" style:font-size-asian="20pt" style:font-style-asian="normal" style:font-weight-asian="bold" style:font-name-complex="Fira Sans Light" style:font-size-complex="20pt" style:font-style-complex="normal" style:font-weight-complex="bold"/>
    </style:style>
    <style:style style:name="T78" style:family="text">
      <style:text-properties style:text-position="0% 100%" style:font-name="Fira Sans Light" fo:font-size="20pt" fo:font-style="italic" fo:font-weight="normal" style:font-name-asian="Fira Sans Light" style:font-size-asian="20pt" style:font-style-asian="italic" style:font-weight-asian="normal" style:font-name-complex="Fira Sans Light" style:font-size-complex="20pt" style:font-style-complex="italic" style:font-weight-complex="normal"/>
    </style:style>
    <style:style style:name="T79" style:family="text">
      <style:text-properties style:text-position="0% 100%" style:font-name="Fira Sans Light" fo:font-size="20pt" fo:font-style="normal" fo:font-weight="bold" style:font-name-asian="Fira Sans Light" style:font-size-asian="20pt" style:font-style-asian="normal" style:font-weight-asian="bold" style:font-name-complex="Fira Sans Light" style:font-size-complex="20pt" style:font-style-complex="italic" style:font-weight-complex="bold"/>
    </style:style>
    <style:style style:name="T80" style:family="text">
      <style:text-properties style:text-position="0% 100%" style:font-name="Fira Sans Light" fo:font-size="20pt" fo:font-style="normal" fo:font-weight="normal" style:font-name-asian="Fira Sans Light" style:font-size-asian="20pt" style:font-style-asian="normal" style:font-weight-asian="normal" style:font-name-complex="Fira Sans Light" style:font-size-complex="20pt" style:font-style-complex="italic" style:font-weight-complex="normal"/>
    </style:style>
    <style:style style:name="T81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20pt" fo:font-style="normal" fo:text-shadow="none" style:text-underline-style="none" fo:font-weight="bold" style:letter-kerning="true" style:font-name-asian="Fira Sans Light" style:font-size-asian="20pt" style:font-style-asian="normal" style:font-weight-asian="bold" style:font-name-complex="Fira Sans Light" style:font-size-complex="20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20pt" fo:font-style="normal" fo:text-shadow="none" style:text-underline-style="none" fo:font-weight="normal" style:letter-kerning="true" style:font-name-asian="Fira Sans Light" style:font-size-asian="20pt" style:font-style-asian="normal" style:font-weight-asian="normal" style:font-name-complex="Fira Sans Light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position="0% 100%" style:font-name="Fira Sans Light" fo:font-size="20pt" fo:font-style="normal" fo:font-weight="bold" style:font-name-asian="Fira Sans Light" style:font-size-asian="20pt" style:font-style-asian="normal" style:font-weight-asian="bold" style:font-name-complex="Fira Sans Light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7 -</text:p>
            <text:p text:style-name="P1">Q-Learning with Linear Value Function Approxi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Recap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Value Function is more explicit in storing the value of executing </text:span><text:span text:style-name="T3">an action</text:span><text:span text:style-name="T2"> in a </text:span><text:span text:style-name="T3">given state: <text:s/>q(s, a)</text:span></text:p>
                <text:p><text:span text:style-name="T2"/></text:p>
                <text:p><text:span text:style-name="T4"/></text:p>
              </text:list-item>
              <text:list-item>
                <text:p><text:span text:style-name="T4">Instance of </text:span><text:span text:style-name="T5">model-free learning – </text:span><text:span text:style-name="T2">i.e. environment dynamics is unknown to the agent</text:span></text:p>
                <text:p><text:span text:style-name="T2"/></text:p>
              </text:list-item>
              <text:list-item>
                <text:p><text:span text:style-name="T2">We tackled environments where number of states is small enough to use a </text:span><text:span text:style-name="T3">tabular </text:span><text:span text:style-name="T2">representation of the Q-Function</text:span></text:p>
              </text:list-item>
            </text:list>
          </draw:text-box>
        </draw:frame>
        <draw:frame draw:style-name="gr2" draw:text-style-name="P5" draw:layer="layout" svg:width="23.959cm" svg:height="1.578cm" svg:x="2.021cm" svg:y="7.5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Recap</text:p>
          </draw:text-box>
        </draw:frame>
        <draw:frame presentation:style-name="pr4" draw:text-style-name="P7" draw:layer="layout" svg:width="12.297cm" svg:height="13.882cm" svg:x="1.4cm" svg:y="4.914cm" presentation:class="outline" presentation:user-transformed="true">
          <draw:text-box>
            <text:p><text:span text:style-name="T6">Agent learns by observing consequences</text:span></text:p>
            <text:p><text:span text:style-name="T6">of actions it takes in the environment</text:span></text:p>
            <text:p><text:span text:style-name="T6"/></text:p>
            <text:p><text:span text:style-name="T6">Q-values adjusted through </text:span><text:span text:style-name="T7">temporal </text:span></text:p>
            <text:p><text:span text:style-name="T7">differences</text:span></text:p>
            <text:p><text:span text:style-name="T6"/></text:p>
            <text:p><text:span text:style-name="T6">Learning is </text:span><text:span text:style-name="T7">off-policy</text:span></text:p>
            <text:p><text:span text:style-name="T8"><text:s text:c="4"/></text:span><text:span text:style-name="T9">Learning policy is greedy</text:span></text:p>
            <text:p><text:span text:style-name="T10"><text:s text:c="4"/></text:span><text:span text:style-name="T11">Play policy allows for exploration</text:span></text:p>
            <text:p><text:span text:style-name="T6"/></text:p>
            <text:p text:style-name="P6"><text:span text:style-name="T12">procedure </text:span><text:span text:style-name="T13">ε</text:span><text:span text:style-name="T14">-Greedy</text:span><text:span text:style-name="T15"> </text:span><text:span text:style-name="T14">(s, q, </text:span><text:span text:style-name="T16">ε</text:span><text:span text:style-name="T17">)</text:span></text:p>
            <text:p text:style-name="P6"><text:span text:style-name="T14"><text:s text:c="4"/></text:span><text:span text:style-name="T14">with prob </text:span><text:span text:style-name="T16">ε: <text:s text:c="3"/>return </text:span><text:span text:style-name="T18">random(A)</text:span><text:span text:style-name="T17"> </text:span></text:p>
            <text:p text:style-name="P6"><text:span text:style-name="T14"><text:s text:c="4"/></text:span><text:span text:style-name="T14">with prob 1-</text:span><text:span text:style-name="T16">ε: return </text:span></text:p>
            <text:p text:style-name="P6"><text:span text:style-name="T19">end </text:span></text:p>
          </draw:text-box>
        </draw:frame>
        <draw:frame presentation:style-name="pr4" draw:text-style-name="P8" draw:layer="layout" svg:width="12.865cm" svg:height="13.882cm" svg:x="14.313cm" svg:y="4.914cm" presentation:class="outline" presentation:user-transformed="true">
          <draw:text-box>
            <text:p text:style-name="P6"><text:span text:style-name="T20">procedure Q-Learning (&lt;S, A, </text:span><text:span text:style-name="T21">γ</text:span><text:span text:style-name="T22">&gt;, </text:span><text:span text:style-name="T23">ε</text:span><text:span text:style-name="T24">)</text:span></text:p>
            <text:p text:style-name="P6"><text:span text:style-name="T25"><text:s text:c="4"/></text:span><text:span text:style-name="T24">for</text:span><text:span text:style-name="T25"> all s in S, a in A </text:span><text:span text:style-name="T24">do</text:span></text:p>
            <text:p text:style-name="P6"><text:span text:style-name="T25"><text:s text:c="8"/></text:span><text:span text:style-name="T26">q(s,a) ← 0</text:span><text:span text:style-name="T25"><text:tab/></text:span><text:span text:style-name="T25"><text:tab/></text:span><text:span text:style-name="T25">// set initial values to 0</text:span></text:p>
            <text:p text:style-name="P6"><text:span text:style-name="T25"><text:s text:c="4"/></text:span><text:span text:style-name="T24">end for</text:span></text:p>
            <text:p text:style-name="P6"><text:span text:style-name="T25"><text:s text:c="4"/></text:span><text:span text:style-name="T24">for</text:span><text:span text:style-name="T25"> all episodes </text:span><text:span text:style-name="T24">do</text:span></text:p>
            <text:p text:style-name="P6"><text:span text:style-name="T24"><text:s text:c="8"/></text:span><text:span text:style-name="T25">s ← initial state </text:span></text:p>
            <text:p text:style-name="P6"><text:span text:style-name="T25"><text:s text:c="8"/></text:span><text:span text:style-name="T24">while </text:span><text:span text:style-name="T25">s not final state </text:span><text:span text:style-name="T24">do</text:span></text:p>
            <text:p text:style-name="P6"><text:span text:style-name="T27"><text:s text:c="12"/></text:span><text:span text:style-name="T28">pick action </text:span><text:span text:style-name="T29">a </text:span><text:span text:style-name="T30">using </text:span><text:span text:style-name="T13">ε</text:span><text:span text:style-name="T14">-Greedy</text:span><text:span text:style-name="T31"> </text:span><text:span text:style-name="T14">(s, q, </text:span><text:span text:style-name="T16">ε</text:span><text:span text:style-name="T17">)</text:span></text:p>
            <text:p text:style-name="P6"><text:span text:style-name="T17"><text:s text:c="13"/></text:span><text:span text:style-name="T17">execute </text:span><text:span text:style-name="T32">a</text:span><text:span text:style-name="T33"> → get reward r and next state </text:span><text:span text:style-name="T34">s’</text:span></text:p>
            <text:p text:style-name="P6"><text:span text:style-name="T35"><text:s text:c="13"/></text:span><text:span text:style-name="T34">q(s, a) ← q(s, a) + α(r + γ</text:span><text:span text:style-name="T36">max</text:span><text:span text:style-name="T37">a’</text:span><text:span text:style-name="T36">q(s’,a’ )</text:span><text:span text:style-name="T34"> - q(s, a))</text:span></text:p>
            <text:p text:style-name="P6"><text:span text:style-name="T33"><text:s text:c="13"/></text:span><text:span text:style-name="T34">s ← s’</text:span></text:p>
            <text:p text:style-name="P6"><text:span text:style-name="T25"><text:s text:c="8"/></text:span><text:span text:style-name="T24">end while</text:span></text:p>
            <text:p text:style-name="P6"><text:span text:style-name="T24"><text:s text:c="4"/></text:span><text:span text:style-name="T24">end for</text:span><text:span text:style-name="T25"> </text:span></text:p>
            <text:p text:style-name="P6"><text:span text:style-name="T25"><text:s text:c="4"/></text:span><text:span text:style-name="T38">for</text:span><text:span text:style-name="T39"> all </text:span><text:span text:style-name="T40">s</text:span><text:span text:style-name="T39"> in S </text:span><text:span text:style-name="T38">do</text:span></text:p>
            <text:p text:style-name="P6"><text:span text:style-name="T38"><text:s text:c="8"/></text:span><text:span text:style-name="T40">π(s)</text:span><text:span text:style-name="T39"> ← </text:span><text:span text:style-name="T40">argmax</text:span><text:span text:style-name="T41">a in A</text:span><text:span text:style-name="T40"> q(s, a)</text:span></text:p>
            <text:p text:style-name="P6"><text:span text:style-name="T39"><text:s text:c="4"/></text:span><text:span text:style-name="T38">end for </text:span></text:p>
            <text:p text:style-name="P6"><text:span text:style-name="T22"><text:s text:c="4"/></text:span><text:span text:style-name="T22">return </text:span><text:span text:style-name="T26">π</text:span></text:p>
            <text:p text:style-name="P6"><text:span text:style-name="T25"><text:s text:c="4"/></text:span></text:p>
          </draw:text-box>
        </draw:frame>
        <draw:frame draw:style-name="gr2" draw:text-style-name="P5" draw:layer="layout" svg:width="3.589cm" svg:height="1.01cm" svg:x="6.909cm" svg:y="16.8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in continuous state spac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y real world problems have enormous state and/or action spaces (e.g. robotics control, self driving)</text:p>
                <text:p/>
              </text:list-item>
              <text:list-item>
                <text:p>Tabular representation is not really appropriate</text:p>
                <text:p/>
              </text:list-item>
              <text:list-item>
                <text:p>Idea: Use a function to represent the val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General Formulati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<text:span text:style-name="T42">features</text:span> to represent state and action </text:p>
                <text:p/>
                <text:p/>
              </text:list-item>
              <text:list-item>
                <text:p>Q-function represented as <text:span text:style-name="T3">weighted linear combination of features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4.912cm" svg:height="3.551cm" svg:x="18.226cm" svg:y="3.8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5" draw:layer="layout" svg:width="10.024cm" svg:height="1.71cm" svg:x="9.078cm" svg:y="10.9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5" draw:layer="layout" svg:width="11.316cm" svg:height="0.935cm" svg:x="8.382cm" svg:y="16.00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Simplifie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action space <text:span text:style-name="T3">A</text:span> is <text:span text:style-name="T42">small </text:span>and <text:span text:style-name="T42">finite</text:span></text:p>
                <text:p><text:span text:style-name="T44">consider a featurised representation of states only</text:span></text:p>
                <text:p/>
              </text:list-item>
              <text:list-item>
                <text:p>Q-function represented as <text:span text:style-name="T3">collection </text:span><text:span text:style-name="T2">of</text:span> <text:span text:style-name="T5">weighted linear combination of features –</text:span><text:span text:style-name="T3"> one model per action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3.634cm" svg:height="3.551cm" svg:x="21.528cm" svg:y="3.8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10.595cm" svg:height="1.71cm" svg:x="9.026cm" svg:y="11.9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10.677cm" svg:height="0.935cm" svg:x="8.382cm" svg:y="16.0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TD Target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Q-Function, instead of the actual gain per episode under current policy<text:span text:style-name="T44"> <text:s text:c="12"/>use </text:span><text:span text:style-name="T43">TD-target </text:span></text:p>
                <text:p/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12.693cm" svg:height="0.885cm" svg:x="7.654cm" svg:y="10.2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5" draw:layer="layout" svg:width="2.35cm" svg:height="0.766cm" svg:x="7.816cm" svg:y="6.24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5" draw:layer="layout" svg:width="6.088cm" svg:height="0.87cm" svg:x="15.6cm" svg:y="6.1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5" draw:layer="layout" svg:width="19.848cm" svg:height="0.87cm" svg:x="4.076cm" svg:y="12.33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11.875cm" svg:height="0.87cm" svg:x="8.035cm" svg:y="14.3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, Linear Approximation, TD target</text:p>
          </draw:text-box>
        </draw:frame>
        <draw:frame presentation:style-name="pr4" draw:text-style-name="P7" draw:layer="layout" svg:width="12.297cm" svg:height="13.882cm" svg:x="15.4cm" svg:y="4.914cm" presentation:class="outline" presentation:user-transformed="true">
          <draw:text-box>
            <text:p><text:span text:style-name="T6">Agent learns by observing consequences</text:span></text:p>
            <text:p><text:span text:style-name="T6">of actions it takes in the environment</text:span></text:p>
            <text:p><text:span text:style-name="T6"/></text:p>
            <text:p><text:span text:style-name="T6">Q-values adjusted through </text:span><text:span text:style-name="T7">temporal </text:span></text:p>
            <text:p><text:span text:style-name="T7">differences</text:span></text:p>
            <text:p><text:span text:style-name="T6"/></text:p>
            <text:p><text:span text:style-name="T6">Learning is </text:span><text:span text:style-name="T7">off-policy</text:span></text:p>
            <text:p><text:span text:style-name="T8"><text:s text:c="4"/></text:span><text:span text:style-name="T9">Learning policy is greedy</text:span></text:p>
            <text:p><text:span text:style-name="T10"><text:s text:c="4"/></text:span><text:span text:style-name="T11">Play policy allows for exploration</text:span></text:p>
            <text:p><text:span text:style-name="T6"/></text:p>
            <text:p text:style-name="P6"><text:span text:style-name="T12">procedure </text:span><text:span text:style-name="T13">ε</text:span><text:span text:style-name="T14">-Greedy</text:span><text:span text:style-name="T15"> </text:span><text:span text:style-name="T14">(o</text:span><text:span text:style-name="T45">s</text:span><text:span text:style-name="T14">, estimator, </text:span><text:span text:style-name="T16">ε</text:span><text:span text:style-name="T17">)</text:span></text:p>
            <text:p text:style-name="P6"><text:span text:style-name="T14"><text:s text:c="4"/></text:span><text:span text:style-name="T46">x(s)</text:span><text:span text:style-name="T14"> = featurize(o</text:span><text:span text:style-name="T45">s</text:span><text:span text:style-name="T14">)</text:span></text:p>
            <text:p text:style-name="P6"><text:span text:style-name="T14"><text:s text:c="4"/></text:span><text:span text:style-name="T14">q</text:span><text:span text:style-name="T13">̂</text:span><text:span text:style-name="T14"> = estimator(x(s)</text:span><text:span text:style-name="T47">)</text:span><text:span text:style-name="T14"> </text:span></text:p>
            <text:p text:style-name="P6"><text:span text:style-name="T14"><text:s text:c="4"/></text:span><text:span text:style-name="T14">with prob </text:span><text:span text:style-name="T16">ε: <text:s text:c="3"/>return </text:span><text:span text:style-name="T18">random(A)</text:span><text:span text:style-name="T17"> </text:span></text:p>
            <text:p text:style-name="P6"><text:span text:style-name="T14"><text:s text:c="4"/></text:span><text:span text:style-name="T14">with prob 1-</text:span><text:span text:style-name="T16">ε: return </text:span></text:p>
            <text:p text:style-name="P6"><text:span text:style-name="T19">end </text:span></text:p>
          </draw:text-box>
        </draw:frame>
        <draw:frame presentation:style-name="pr4" draw:text-style-name="P8" draw:layer="layout" svg:width="12.865cm" svg:height="13.882cm" svg:x="0.713cm" svg:y="4.914cm" presentation:class="outline" presentation:user-transformed="true">
          <draw:text-box>
            <text:p text:style-name="P6"><text:span text:style-name="T20">procedure Q-Learning (&lt;S, A, </text:span><text:span text:style-name="T21">γ</text:span><text:span text:style-name="T22">&gt;, </text:span><text:span text:style-name="T23">ε, estimator</text:span><text:span text:style-name="T24">)</text:span></text:p>
            <text:p text:style-name="P6"><text:span text:style-name="T25"><text:s text:c="4"/></text:span><text:span text:style-name="T24">for</text:span><text:span text:style-name="T25"> all episodes </text:span><text:span text:style-name="T24">do</text:span></text:p>
            <text:p text:style-name="P6"><text:span text:style-name="T24"><text:s text:c="8"/></text:span></text:p>
            <text:p text:style-name="P6"><text:span text:style-name="T24"><text:s text:c="8"/></text:span><text:span text:style-name="T25">s ← initial state </text:span></text:p>
            <text:p text:style-name="P6"><text:span text:style-name="T25"><text:s text:c="8"/></text:span><text:span text:style-name="T24">while </text:span><text:span text:style-name="T25">s not final state </text:span><text:span text:style-name="T24">do</text:span></text:p>
            <text:p text:style-name="P6"><text:span text:style-name="T27"><text:s text:c="12"/></text:span><text:span text:style-name="T28">pick action </text:span><text:span text:style-name="T29">a </text:span><text:span text:style-name="T30">using </text:span><text:span text:style-name="T13">ε</text:span><text:span text:style-name="T14">-Greedy</text:span><text:span text:style-name="T31"> </text:span><text:span text:style-name="T14">(o</text:span><text:span text:style-name="T45">s</text:span><text:span text:style-name="T14">, estimator, </text:span><text:span text:style-name="T16">ε</text:span><text:span text:style-name="T17">)</text:span></text:p>
            <text:p text:style-name="P6"><text:span text:style-name="T17"><text:s text:c="13"/></text:span><text:span text:style-name="T17">execute </text:span><text:span text:style-name="T32">a</text:span><text:span text:style-name="T33"> → get reward r and next state </text:span><text:span text:style-name="T34">s’</text:span></text:p>
            <text:p text:style-name="P6"><text:span text:style-name="T34"><text:s text:c="13"/></text:span><text:span text:style-name="T34">x(s’) = featurize(o</text:span><text:span text:style-name="T48">s’</text:span><text:span text:style-name="T49">)</text:span></text:p>
            <text:p text:style-name="P6"><text:span text:style-name="T50"><text:s text:c="13"/></text:span><text:span text:style-name="T50">[q</text:span><text:span text:style-name="T51">̂</text:span><text:span text:style-name="T52">a1</text:span><text:span text:style-name="T51">(s’), …, </text:span><text:span text:style-name="T35">q</text:span><text:span text:style-name="T53">̂</text:span><text:span text:style-name="T54">am</text:span><text:span text:style-name="T53">(s’)] = estimator.predict(x(s’)</text:span><text:span text:style-name="T55">)</text:span></text:p>
            <text:p text:style-name="P6"><text:span text:style-name="T56"><text:s text:c="13"/></text:span><text:span text:style-name="T56">td</text:span><text:span text:style-name="T52">target</text:span><text:span text:style-name="T56"> = </text:span><text:span text:style-name="T51"><text:s/></text:span><text:span text:style-name="T57">r + γ</text:span><text:span text:style-name="T58">max</text:span><text:span text:style-name="T59">a’</text:span><text:span text:style-name="T60">q</text:span><text:span text:style-name="T61">̂</text:span><text:span text:style-name="T62">a’</text:span><text:span text:style-name="T36">(s’)</text:span></text:p>
            <text:p text:style-name="P6"><text:span text:style-name="T35"><text:s text:c="13"/></text:span><text:span text:style-name="T34">estimator.update(s, a, </text:span><text:span text:style-name="T35">td</text:span><text:span text:style-name="T63">target</text:span><text:span text:style-name="T34">)</text:span></text:p>
            <text:p text:style-name="P6"><text:span text:style-name="T33"><text:s text:c="13"/></text:span><text:span text:style-name="T34">s ← s’</text:span></text:p>
            <text:p text:style-name="P6"><text:span text:style-name="T25"><text:s text:c="8"/></text:span><text:span text:style-name="T24">end while</text:span></text:p>
            <text:p text:style-name="P6"><text:span text:style-name="T24"><text:s text:c="4"/></text:span><text:span text:style-name="T24">end for</text:span><text:span text:style-name="T25"> </text:span></text:p>
            <text:p text:style-name="P6"><text:span text:style-name="T25"/></text:p>
            <text:p text:style-name="P6"><text:span text:style-name="T25"><text:s text:c="4"/></text:span><text:span text:style-name="T38">for</text:span><text:span text:style-name="T39"> all </text:span><text:span text:style-name="T40">s</text:span><text:span text:style-name="T39"> in S </text:span><text:span text:style-name="T38">do</text:span></text:p>
            <text:p text:style-name="P6"><text:span text:style-name="T38"><text:s text:c="8"/></text:span><text:span text:style-name="T40">π(s)</text:span><text:span text:style-name="T39"> ← </text:span><text:span text:style-name="T40">argmax</text:span><text:span text:style-name="T41">a in A</text:span><text:span text:style-name="T40"> q(s, a)</text:span></text:p>
            <text:p text:style-name="P6"><text:span text:style-name="T39"><text:s text:c="4"/></text:span><text:span text:style-name="T38">end for </text:span></text:p>
            <text:p text:style-name="P6"><text:span text:style-name="T22"><text:s text:c="4"/></text:span><text:span text:style-name="T22">return </text:span><text:span text:style-name="T26">π</text:span></text:p>
            <text:p text:style-name="P6"><text:span text:style-name="T25"><text:s text:c="4"/></text:span></text:p>
          </draw:text-box>
        </draw:frame>
        <draw:frame draw:style-name="gr2" draw:text-style-name="P5" draw:layer="layout" svg:width="3.205cm" svg:height="1.01cm" svg:x="20.095cm" svg:y="17.22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Cartpole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ymnasium.farama.org/environments/classic_control/cart_pole/" xlink:type="simple">Cartpole-v1</text:a><text:s/>environment in <text:a xlink:href="https://gymnasium.farama.org/" xlink:type="simple">Gymnasium</text:a>:</text:p>
                <text:list>
                  <text:list-item>
                    <text:p>Objective: keep a pendulum upright for as long as possible</text:p>
                  </text:list-item>
                  <text:list-item>
                    <text:p>2 actions: left (force = -1), right (force = +1)</text:p>
                  </text:list-item>
                  <text:list-item>
                    <text:p>Reward: +1 for every time step that the pole remains upright</text:p>
                  </text:list-item>
                  <text:list-item>
                    <text:p>Game ends when pole more the 15<text:span text:style-name="T64">°</text:span><text:span text:style-name="T65"> from vertical </text:span><text:span text:style-name="T66">OR cart moves &gt; 2.4 units from center</text:span></text:p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3" draw:text-style-name="P10" draw:layer="layout" svg:width="11.694cm" svg:height="7.619cm" svg:x="10.912cm" svg:y="11.938cm">
          <draw:image xlink:href="Pictures/10000000000001BA0000012084A218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Cartpole Environment</text:p>
          </draw:text-box>
        </draw:frame>
        <draw:frame presentation:style-name="pr4" draw:layer="layout" svg:width="25.199cm" svg:height="14.39cm" svg:x="1.4cm" svg:y="4.014cm" presentation:class="outline" presentation:user-transformed="true">
          <draw:text-box>
            <text:list text:style-name="L2">
              <text:list-item>
                <text:p text:style-name="P11"><text:a xlink:href="https://gymnasium.farama.org/environments/classic_control/cart_pole/" xlink:type="simple">Cartpole-v1</text:a><text:s/>environment in <text:a xlink:href="https://gymnasium.farama.org/" xlink:type="simple">Gymnasium</text:a>:</text:p>
                <text:list>
                  <text:list-item>
                    <text:p><text:span text:style-name="T67">Max num steps per episode <text:s/>= 100</text:span></text:p>
                  </text:list-item>
                  <text:list-item>
                    <text:p><text:span text:style-name="T67">Use </text:span><text:span text:style-name="T68">one q-function estimator per </text:span><text:span text:style-name="T68">action: </text:span><text:span text:style-name="T69">q</text:span><text:span text:style-name="T70">̂</text:span><text:span text:style-name="T71">left </text:span><text:span text:style-name="T72">, </text:span><text:span text:style-name="T73">q</text:span><text:span text:style-name="T74">̂</text:span><text:span text:style-name="T75">right</text:span></text:p>
                  </text:list-item>
                  <text:list-item>
                    <text:p><text:span text:style-name="T76">Use a MLP-like feature extractor</text:span></text:p>
                    <text:list>
                      <text:list-item>
                        <text:p><text:span text:style-name="T76">Sample 4 sets of weights and 4 </text:span><text:span text:style-name="T76">sets of biases</text:span></text:p>
                        <text:list>
                          <text:list-item>
                            <text:p><text:span text:style-name="T76"/></text:p>
                          </text:list-item>
                          <text:list-item>
                            <text:p><text:span text:style-name="T76"/></text:p>
                          </text:list-item>
                        </text:list>
                      </text:list-item>
                      <text:list-item>
                        <text:p><text:span text:style-name="T77">Explore</text:span><text:span text:style-name="T76"> different activation </text:span><text:span text:style-name="T76">functions: </text:span><text:span text:style-name="T78">cos(x), sigmoid(x), </text:span><text:span text:style-name="T78">tanh(x)</text:span></text:p>
                      </text:list-item>
                      <text:list-item>
                        <text:p><text:span text:style-name="T79">Explore </text:span><text:span text:style-name="T80">different values of the </text:span><text:span text:style-name="T80">SGD learning rate (5e-4 is </text:span><text:span text:style-name="T80">default)</text:span></text:p>
                      </text:list-item>
                      <text:list-item>
                        <text:p><text:span text:style-name="T81">Explore</text:span><text:span text:style-name="T82"> different values of ε – </text:span><text:span text:style-name="T82">ε=0.0, ε=0.1, </text:span><text:span text:style-name="T76">ε=decay(init=0.1, </text:span><text:span text:style-name="T76">min = 0.001, factor=0.99)</text:span></text:p>
                      </text:list-item>
                    </text:list>
                  </text:list-item>
                  <text:list-item>
                    <text:p><text:span text:style-name="T83">Plot </text:span><text:span text:style-name="T76">agent learning curves for each </text:span><text:span text:style-name="T76">case</text:span></text:p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2" draw:text-style-name="P5" draw:layer="layout" svg:width="18.018cm" svg:height="0.885cm" svg:x="6.158cm" svg:y="10.70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5" draw:layer="layout" svg:width="10.203cm" svg:height="0.885cm" svg:x="6.259cm" svg:y="11.7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Sans" svg:font-family="'Fira Sans'" style:font-adornments="ExtraLight" style:font-family-generic="swiss" style:font-pitch="variable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1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false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Fira Sans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false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Fira Sans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 loext:decorative="false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 loext:decorative="false"/>
    </style:style>
    <style:style style:name="Mgr6" style:family="graphic" style:parent-style-name="standard">
      <style:graphic-properties draw:stroke="none" svg:stroke-color="#ff6600" draw:fill-color="#003333" loext:decorative="false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 loext:decorative="false"/>
    </style:style>
    <style:style style:name="Mgr8" style:family="graphic" style:parent-style-name="standard">
      <style:graphic-properties draw:stroke="none" draw:fill="none" draw:fill-color="#ffffff" fo:min-height="11.929cm" loext:decorative="false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 loext:decorative="false"/>
    </style:style>
    <style:style style:name="Mpr3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 loext:decorative="false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text-properties fo:color="#ffffff" loext:opacity="100%" style:font-name="Fira Sans1" fo:font-size="14pt" fo:font-weight="normal" style:font-size-asian="14pt" style:font-size-complex="14pt"/>
    </style:style>
    <style:style style:name="MP25" style:family="paragraph">
      <loext:graphic-properties draw:fill="none" draw:fill-color="#ffffff"/>
      <style:text-properties fo:color="#ffffff" loext:opacity="100%" style:font-name="Fira Sans1" fo:font-size="14pt" fo:font-weight="normal" style:font-size-asian="14pt" style:font-size-complex="14pt"/>
    </style:style>
    <style:style style:name="MP26" style:family="paragraph">
      <style:paragraph-properties fo:text-align="end"/>
      <style:text-properties fo:color="#ffffff" loext:opacity="100%" style:font-name="Fira Sans Light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ffffff" loext:opacity="100%" style:font-name="Fira Sans Light" fo:font-size="14pt" fo:font-weight="normal" style:font-size-asian="14pt" style:font-size-complex="14pt"/>
    </style:style>
    <style:style style:name="MP28" style:family="paragraph"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text-properties fo:font-size="14pt" style:font-size-asian="14pt" style:font-size-complex="14pt"/>
    </style:style>
    <style:style style:name="MP30" style:family="paragraph">
      <style:paragraph-properties fo:text-align="end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color="#ffffff" loext:opacity="100%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loext:opacity="100%" style:font-name="Fira Sans Light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loext:opacity="100%" style:font-name="Fira Sans Light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loext:opacity="100%" style:font-name="Fira Sans Light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9T14:56:05.297435605</meta:creation-date>
    <meta:editing-duration>P1DT7H38M7S</meta:editing-duration>
    <meta:editing-cycles>79</meta:editing-cycles>
    <meta:generator>LibreOffice/24.2.7.2$Linux_X86_64 LibreOffice_project/420$Build-2</meta:generator>
    <dc:title>Midnightblue</dc:title>
    <meta:initial-creator>Alexandru Sorici</meta:initial-creator>
    <dc:date>2026-03-30T14:13:48.113469094</dc:date>
    <dc:creator>Alexandru Sorici</dc:creator>
    <meta:print-date>2025-04-14T15:02:56.255121762</meta:print-date>
    <meta:printed-by>PDF files: Alexandru Sorici</meta:printed-by>
    <meta:document-statistic meta:object-count="136"/>
  </office:meta>
</office:document-meta>
</file>

<file path=Object 1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row>
                <msub>
                  <mi>R</mi>
                  <mrow>
                    <mi>t</mi>
                    <mo stretchy="false">+</mo>
                    <mn>2</mn>
                  </mrow>
                </msub>
                <mo stretchy="false">+</mo>
                <msup>
                  <mi>γ</mi>
                  <mn>2</mn>
                </msup>
              </mrow>
              <mrow>
                <mrow>
                  <msub>
                    <mi>R</mi>
                    <mrow>
                      <mi>t</mi>
                      <mo stretchy="false">+</mo>
                      <mn>3</mn>
                    </mrow>
                  </msub>
                  <mo stretchy="false">+</mo>
                  <mn>...</mn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sub>
          <mi>E</mi>
          <mi>π</mi>
        </msub>
      </mrow>
      <mrow>
        <mo fence="true" stretchy="true">[</mo>
        <mrow>
          <mrow>
            <mrow>
              <mrow>
                <munder>
                  <mo stretchy="false">∑</mo>
                  <mrow>
                    <mi>τ</mi>
                    <mo stretchy="false">=</mo>
                    <mrow>
                      <mi>t</mi>
                      <mo stretchy="false">+</mo>
                      <mn>1</mn>
                    </mrow>
                  </mrow>
                </munder>
                <mrow>
                  <msup>
                    <mi>γ</mi>
                    <mrow>
                      <mi>τ</mi>
                      <mo stretchy="false">−</mo>
                      <mi>t</mi>
                      <mo stretchy="false">−</mo>
                      <mn>1</mn>
                    </mrow>
                  </msup>
                  <msub>
                    <mi>R</mi>
                    <mi>τ</mi>
                  </msub>
                </mrow>
              </mrow>
              <mo stretchy="false">∣</mo>
              <msub>
                <mi>S</mi>
                <mi>t</mi>
              </msub>
              <mo stretchy="false">=</mo>
              <mi>s</mi>
            </mrow>
            <mi>,</mi>
            <mrow>
              <msub>
                <mi>A</mi>
                <mi>t</mi>
              </msub>
              <mo stretchy="false">=</mo>
              <mi>a</mi>
            </mrow>
          </mrow>
        </mrow>
        <mo fence="true" stretchy="true">]</mo>
      </mrow>
    </mrow>
    <annotation encoding="StarMath 5.0">q^{%pi}(s,a) = E_{%pi} { [ R_{t+1} + %gamma R_{t+2} + %gamma^2 R_{t+3} + ... divides S_t = s, A_t = a]} = E_{%pi} left [ sum from {%tau = t + 1} {%gamma^{%tau - t - 1} R_%tau} divides  S_t = s, A_t = a right ] 
</annotation>
  </semantics>
</math>
</file>

<file path=Object 10/content.xml><?xml version="1.0" encoding="utf-8"?>
<math xmlns="http://www.w3.org/1998/Math/MathML" display="block">
  <semantics>
    <mrow>
      <msubsup>
        <mi>b</mi>
        <mi>i</mi>
        <mi>k</mi>
      </msubsup>
      <mtext>~</mtext>
      <mi mathvariant="italic">uniform</mi>
      <mrow>
        <mo fence="true" stretchy="false">(</mo>
        <mrow>
          <mrow>
            <mn>0,</mn>
            <mn>2</mn>
            <mi>π</mi>
          </mrow>
        </mrow>
        <mo fence="true" stretchy="false">)</mo>
      </mrow>
      <mi>,</mi>
      <mrow>
        <mi>k</mi>
        <mo stretchy="false">=</mo>
        <mn>1.</mn>
      </mrow>
      <mn>.4</mn>
      <mtext> </mtext>
      <mi>,</mi>
      <mrow>
        <mi>i</mi>
        <mo stretchy="false">=</mo>
        <mn>1.</mn>
      </mrow>
      <mn>.100</mn>
    </mrow>
    <annotation encoding="StarMath 5.0">b^k_i "~" uniform( 0, 2%pi ), k = 1..4 " ", i=1..100 </annotation>
  </semantics>
</math>
</file>

<file path=Object 14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p>
        <mrow>
          <mo fence="true" stretchy="false">(</mo>
          <mrow>
            <mrow>
              <mrow>
                <mi>r</mi>
                <mo stretchy="false">+</mo>
                <mi>γ</mi>
              </mrow>
              <msub>
                <mi mathvariant="italic">max</mi>
                <mrow>
                  <mi>a</mi>
                  <mi>'</mi>
                </mrow>
              </msub>
              <mover accent="true">
                <msub>
                  <mi>Q</mi>
                  <mrow>
                    <mi>a</mi>
                    <mi>'</mi>
                  </mrow>
                </msub>
                <mo stretchy="false">^</mo>
              </mover>
              <mrow>
                <mrow>
                  <mo fence="true" stretchy="false">(</mo>
                  <mrow>
                    <mrow>
                      <mi>s</mi>
                      <mi>'</mi>
                      <mi>,</mi>
                      <mstyle mathvariant="bold">
                        <mi>w</mi>
                      </mstyle>
                    </mrow>
                  </mrow>
                  <mo fence="true" stretchy="false">)</mo>
                </mrow>
                <mo stretchy="false">−</mo>
                <mover accent="true">
                  <msub>
                    <mi>Q</mi>
                    <mi>a</mi>
                  </msub>
                  <mo stretchy="false">^</mo>
                </mover>
              </mrow>
              <mrow>
                <mo fence="true" stretchy="false">(</mo>
                <mrow>
                  <mrow>
                    <mi>s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nabla_w J( w ) = nabla_w  (r + %gamma max_{a'} hat Q_{a'}(s', bold w) - hat Q_a (s, bold w))^2 </annotation>
  </semantics>
</math>
</file>

<file path=Object 15/content.xml><?xml version="1.0" encoding="utf-8"?>
<math xmlns="http://www.w3.org/1998/Math/MathML">
  <semantics>
    <mrow>
      <munder>
        <mi mathvariant="italic">argmax</mi>
        <mi>a</mi>
      </munder>
      <mrow>
        <mover accent="true">
          <msub>
            <mi>q</mi>
            <mi>a</mi>
          </msub>
          <mo stretchy="false">^</mo>
        </mover>
        <mrow>
          <mo fence="true" stretchy="false">(</mo>
          <mrow>
            <mi>s</mi>
          </mrow>
          <mo fence="true" stretchy="false">)</mo>
        </mrow>
      </mrow>
    </mrow>
    <annotation encoding="StarMath 5.0">argmax csub a { hat q_a (s) }</annotation>
  </semantics>
</math>
</file>

<file path=Object 16/content.xml><?xml version="1.0" encoding="utf-8"?>
<math xmlns="http://www.w3.org/1998/Math/MathML" display="block">
  <semantics>
    <mrow>
      <msup>
        <mi>Q</mi>
        <mi>π</mi>
      </msup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^%pi(s,a)</annotation>
  </semantics>
</math>
</file>

<file path=Object 17/content.xml><?xml version="1.0" encoding="utf-8"?>
<math xmlns="http://www.w3.org/1998/Math/MathML" display="block">
  <semantics>
    <mrow>
      <mrow>
        <mi>r</mi>
        <mo stretchy="false">+</mo>
        <mi>γ</mi>
      </mrow>
      <msub>
        <mi mathvariant="italic">max</mi>
        <mrow>
          <mi>a</mi>
          <mi>'</mi>
        </mrow>
      </msub>
      <mover accent="true">
        <mi>Q</mi>
        <mo stretchy="false">^</mo>
      </mover>
      <mrow>
        <mo fence="true" stretchy="false">(</mo>
        <mrow>
          <mrow>
            <mi>s</mi>
            <mi>'</mi>
            <mi>,</mi>
            <mi>a</mi>
            <mi>'</mi>
            <mi>,</mi>
            <mstyle mathvariant="bold">
              <mi>w</mi>
            </mstyle>
          </mrow>
        </mrow>
        <mo fence="true" stretchy="false">)</mo>
      </mrow>
    </mrow>
    <annotation encoding="StarMath 5.0">r + %gamma max_{a'} hat Q (s', a', bold w)</annotation>
  </semantics>
</math>
</file>

<file path=Object 18/content.xml><?xml version="1.0" encoding="utf-8"?>
<math xmlns="http://www.w3.org/1998/Math/MathML" display="block">
  <semantics>
    <mrow>
      <mi mathvariant="normal">Δ</mi>
      <mrow>
        <mi>w</mi>
        <mo stretchy="false">=</mo>
        <mi>η</mi>
      </mrow>
      <mrow>
        <mo fence="true" form="prefix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sub>
                <mi>Q</mi>
                <mrow>
                  <mi>a</mi>
                  <mi>'</mi>
                </mrow>
              </msub>
              <mo stretchy="false">^</mo>
            </mover>
            <mrow>
              <mrow>
                <mo fence="true" form="prefix" stretchy="false">(</mo>
                <mrow>
                  <mrow>
                    <mi>s</mi>
                    <mi>'</mi>
                    <mi>,</mi>
                    <mstyle mathvariant="bold">
                      <mi>w</mi>
                    </mstyle>
                  </mrow>
                </mrow>
                <mo fence="true" form="postfix" stretchy="false">)</mo>
              </mrow>
              <mo stretchy="false">−</mo>
              <mover accent="true">
                <msub>
                  <mi>Q</mi>
                  <mi>a</mi>
                </msub>
                <mo stretchy="false">^</mo>
              </mover>
            </mrow>
            <mrow>
              <mo fence="true" form="prefix" stretchy="false">(</mo>
              <mrow>
                <mrow>
                  <mi>s</mi>
                  <mi>,</mi>
                  <mstyle mathvariant="bold">
                    <mi>w</mi>
                  </mstyle>
                </mrow>
              </mrow>
              <mo fence="true" form="postfix" stretchy="false">)</mo>
            </mrow>
          </mrow>
        </mrow>
        <mo fence="true" form="postfix" stretchy="false">)</mo>
      </mrow>
      <msub>
        <mo stretchy="false">∇</mo>
        <mi>w</mi>
      </msub>
      <mover accent="true">
        <msub>
          <mi>Q</mi>
          <mi>a</mi>
        </msub>
        <mo stretchy="false">^</mo>
      </mover>
      <mrow>
        <mo fence="true" form="prefix" stretchy="false">(</mo>
        <mrow>
          <mrow>
            <mi>s</mi>
            <mi>,</mi>
            <mstyle mathvariant="bold">
              <mi>w</mi>
            </mstyle>
          </mrow>
        </mrow>
        <mo fence="true" form="postfix" stretchy="false">)</mo>
      </mrow>
      <mtext>, </mtext>
      <mrow>
        <mi>η</mi>
        <mo stretchy="false">−</mo>
        <mi mathvariant="italic">SGD</mi>
      </mrow>
      <mi mathvariant="italic">learning</mi>
      <mi mathvariant="italic">rate</mi>
    </mrow>
    <annotation encoding="StarMath 5.0">%DELTA w = %eta (r + %gamma max_{a'} hat Q_{a'}(s', bold w) - hat Q_a (s, bold w)) Nabla_w hat Q_a (s, bold w) ", " %eta - SGD learning rate</annotation>
  </semantics>
</math>
</file>

<file path=Object 19/content.xml><?xml version="1.0" encoding="utf-8"?>
<math xmlns="http://www.w3.org/1998/Math/MathML" display="block">
  <semantics>
    <mrow>
      <mi mathvariant="normal">Δ</mi>
      <mrow>
        <mi>w</mi>
        <mo stretchy="false">=</mo>
        <mi>η</mi>
      </mrow>
      <mrow>
        <mo fence="true" form="prefix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sub>
                <mi>Q</mi>
                <mrow>
                  <mi>a</mi>
                  <mi>'</mi>
                </mrow>
              </msub>
              <mo stretchy="false">^</mo>
            </mover>
            <mrow>
              <mrow>
                <mo fence="true" form="prefix" stretchy="false">(</mo>
                <mrow>
                  <mrow>
                    <mi>s</mi>
                    <mi>'</mi>
                    <mi>,</mi>
                    <mstyle mathvariant="bold">
                      <mi>w</mi>
                    </mstyle>
                  </mrow>
                </mrow>
                <mo fence="true" form="postfix" stretchy="false">)</mo>
              </mrow>
              <mo stretchy="false">−</mo>
              <mover accent="true">
                <msub>
                  <mi>Q</mi>
                  <mi>a</mi>
                </msub>
                <mo stretchy="false">^</mo>
              </mover>
            </mrow>
            <mrow>
              <mo fence="true" form="prefix" stretchy="false">(</mo>
              <mrow>
                <mrow>
                  <mi>s</mi>
                  <mi>,</mi>
                  <mstyle mathvariant="bold">
                    <mi>w</mi>
                  </mstyle>
                </mrow>
              </mrow>
              <mo fence="true" form="postfix" stretchy="false">)</mo>
            </mrow>
          </mrow>
        </mrow>
        <mo fence="true" form="postfix" stretchy="false">)</mo>
      </mrow>
      <mi>x</mi>
      <mrow>
        <mo fence="true" form="prefix" stretchy="false">(</mo>
        <mrow>
          <mi>s</mi>
        </mrow>
        <mo fence="true" form="postfix" stretchy="false">)</mo>
      </mrow>
    </mrow>
    <annotation encoding="StarMath 5.0">%DELTA w = %eta (r + %gamma max_{a'} hat Q_{a'}(s', bold w) - hat Q_a (s, bold w)) x( s ) </annotation>
  </semantics>
</math>
</file>

<file path=Object 2/content.xml><?xml version="1.0" encoding="utf-8"?>
<math xmlns="http://www.w3.org/1998/Math/MathML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 ) = left ( stack{x_1(s) # x_2(s) # ... # x_n(s)}  right ) 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,a ) = left ( stack{x_1(s,a) # x_2(s,a) # ... # x_n(s,a)}  right ) </annotation>
  </semantics>
</math>
</file>

<file path=Object 5/content.xml><?xml version="1.0" encoding="utf-8"?>
<math xmlns="http://www.w3.org/1998/Math/MathML" display="block">
  <semantics>
    <mrow>
      <mover accent="true">
        <msub>
          <mi>Q</mi>
          <mi>a</mi>
        </msub>
        <mo stretchy="false">^</mo>
      </mover>
      <mrow>
        <mrow>
          <mo fence="true" stretchy="false">(</mo>
          <mrow>
            <mrow>
              <mi>s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i>s</mi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i>s</mi>
        </mrow>
        <mo fence="true" stretchy="false">)</mo>
      </mrow>
      <msub>
        <mi>w</mi>
        <mi>j</mi>
      </msub>
      <mi>,</mi>
      <mo stretchy="false">∀</mo>
      <mrow>
        <mi>a</mi>
        <mo stretchy="false">∈</mo>
        <mi>A</mi>
      </mrow>
    </mrow>
    <annotation encoding="StarMath 5.0">hat Q_a ( s, bold w ) = bold x( s )^T bold w = sum from{j=1} to{n} x_j( s ) w_j, forall a in A</annotation>
  </semantics>
</math>
</file>

<file path=Object 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  <msub>
        <mi>w</mi>
        <mi>j</mi>
      </msub>
    </mrow>
    <annotation encoding="StarMath 5.0">hat Q ( s, a, bold w ) = bold x( s, a )^T bold w = sum from{j=1} to{n} x_j( s,a ) w_j  </annotation>
  </semantics>
</math>
</file>

<file path=Object 7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bsup>
                        <mi>Q</mi>
                        <mi>a</mi>
                        <mi>π</mi>
                      </msub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_a^%pi (s, bold w))^2] </annotation>
  </semantics>
</math>
</file>

<file path=Object 8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p>
                        <mi>Q</mi>
                        <mi>π</mi>
                      </m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i>a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^%pi (s,a, bold w))^2] </annotation>
  </semantics>
</math>
</file>

<file path=Object 9/content.xml><?xml version="1.0" encoding="utf-8"?>
<math xmlns="http://www.w3.org/1998/Math/MathML" display="block">
  <semantics>
    <mrow>
      <msubsup>
        <mi>w</mi>
        <mi mathvariant="italic">ij</mi>
        <mi>k</mi>
      </msubsup>
      <mtext>~</mtext>
      <msqrt>
        <mrow>
          <mn>2</mn>
          <msub>
            <mi>γ</mi>
            <mi>k</mi>
          </msub>
        </mrow>
      </msqrt>
      <mi>N</mi>
      <mrow>
        <mo fence="true" stretchy="false">(</mo>
        <mrow>
          <mrow>
            <mn>0,</mn>
            <mn>1</mn>
          </mrow>
        </mrow>
        <mo fence="true" stretchy="false">)</mo>
      </mrow>
      <mi>,</mi>
      <mtext> </mtext>
      <mrow>
        <mi>k</mi>
        <mo stretchy="false">=</mo>
        <mn>1.</mn>
      </mrow>
      <mn>.4</mn>
      <mi>,</mi>
      <mtext> </mtext>
      <mrow>
        <mi>i</mi>
        <mo stretchy="false">=</mo>
        <mn>1.</mn>
      </mrow>
      <mn>.100,</mn>
      <mrow>
        <mi>j</mi>
        <mo stretchy="false">=</mo>
        <mn>1.</mn>
      </mrow>
      <mn>.4</mn>
      <mtext> </mtext>
      <mrow>
        <msub>
          <mi>γ</mi>
          <mi>k</mi>
        </msub>
        <mo stretchy="false">∈</mo>
        <mrow>
          <mo fence="true" stretchy="false">{</mo>
          <mrow>
            <mrow>
              <mn>5.0,</mn>
              <mn>2.0,</mn>
              <mn>1.0,</mn>
              <mn>0.5</mn>
            </mrow>
          </mrow>
          <mo fence="true" stretchy="false">}</mo>
        </mrow>
      </mrow>
    </mrow>
    <annotation encoding="StarMath 5.0">w^k_{ij} "~" sqrt{2 %gamma_k} N( 0, 1 )," "k=1..4," " i=1..100, j=1..4" " %gamma_k in lbrace 5.0, 2.0, 1.0, 0.5 rbrace</annotation>
  </semantics>
</math>
</file>