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Pictures/1000000000000325000001EC0C0B0B7A.png" manifest:media-type="image/png"/>
  <manifest:file-entry manifest:full-path="Pictures/10000000000003240000024E19335A3B.png" manifest:media-type="image/png"/>
  <manifest:file-entry manifest:full-path="Pictures/100000000000029000000177962B636B.png" manifest:media-type="image/png"/>
  <manifest:file-entry manifest:full-path="Pictures/10000000000001F500000032A991EB69.png" manifest:media-type="image/png"/>
  <manifest:file-entry manifest:full-path="Pictures/10000000000002260000002F0C1A5F43.png" manifest:media-type="image/png"/>
  <manifest:file-entry manifest:full-path="Pictures/1000000000000225000000707C8D7D7C.png" manifest:media-type="image/png"/>
  <manifest:file-entry manifest:full-path="Pictures/10000000000001BC000000278B98C9BD.png" manifest:media-type="image/png"/>
  <manifest:file-entry manifest:full-path="Pictures/1000000000000317000001A7D4C7161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adornments="ExtraLight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1.523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97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97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9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01cm" loext:decorative="false"/>
      <style:paragraph-properties style:writing-mode="lr-tb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1.922cm" loext:decorative="false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19.5pt"/>
    </style:style>
    <style:style style:name="P3" style:family="paragraph">
      <loext:graphic-properties draw:fill="none" draw:fill-color="#ffffff"/>
      <style:text-properties fo:font-size="13.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="none" draw:fill-color="#ffffff"/>
      <style:text-properties fo:color="#2a6099" loext:opacity="100%" style:font-name="Liberation Serif" fo:font-size="13.5pt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color="#2a6099" loext:opacity="100%" style:font-name="Liberation Serif" fo:font-size="13.5pt" fo:font-weight="bold" style:font-weight-asian="bold" style:font-weight-complex="bold"/>
    </style:style>
    <style:style style:name="T1" style:family="text">
      <style:text-properties fo:font-size="19.5pt" fo:font-weight="bold" style:font-weight-asian="bold" style:font-weight-complex="bold"/>
    </style:style>
    <style:style style:name="T2" style:family="text">
      <style:text-properties fo:font-size="19.5pt"/>
    </style:style>
    <style:style style:name="T3" style:family="text">
      <style:text-properties fo:font-size="14pt" style:font-size-asian="13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Fira Sans Light" fo:font-style="italic" fo:font-weight="normal" style:font-name-asian="Fira Sans Light" style:font-style-asian="italic" style:font-weight-asian="normal" style:font-name-complex="Fira Sans Light" style:font-style-complex="italic" style:font-weight-complex="normal"/>
    </style:style>
    <style:style style:name="T8" style:family="text">
      <style:text-properties style:font-name="Fira Sans Light1" fo:font-style="italic" fo:font-weight="normal" style:font-name-asian="Fira Sans Light" style:font-style-asian="italic" style:font-weight-asian="normal" style:font-name-complex="Fira Sans Light" style:font-style-complex="italic" style:font-weight-complex="normal"/>
    </style:style>
    <style:style style:name="T9" style:family="text">
      <style:text-properties style:font-name="Fira Sans Light1" fo:font-style="normal" fo:font-weight="normal" style:font-name-asian="Fira Sans Light" style:font-style-asian="normal" style:font-weight-asian="normal" style:font-name-complex="Fira Sans Light" style:font-style-complex="normal" style:font-weight-complex="normal"/>
    </style:style>
    <style:style style:name="T10" style:family="text">
      <style:text-properties style:font-name="Fira Sans Light" fo:font-style="normal" fo:font-weight="normal" style:font-name-asian="Fira Sans Light" style:font-style-asian="normal" style:font-weight-asian="normal" style:font-name-complex="Fira Sans Light" style:font-style-complex="normal" style:font-weight-complex="normal"/>
    </style:style>
    <style:style style:name="T11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2pt" fo:font-style="normal" fo:text-shadow="none" style:text-underline-style="none" fo:font-weight="bold" style:letter-kerning="true" style:font-name-asian="Fira Sans Light" style:font-size-asian="24pt" style:font-style-asian="normal" style:font-weight-asian="bold" style:font-name-complex="Fira Sans Light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Fira Sans Light" fo:font-style="italic" fo:font-weight="bold" style:font-name-asian="Fira Sans Light" style:font-style-asian="italic" style:font-weight-asian="bold" style:font-name-complex="Fira Sans Light" style:font-style-complex="italic" style:font-weight-complex="bold"/>
    </style:style>
    <style:style style:name="T13" style:family="text">
      <style:text-properties style:text-position="33% 58%" style:font-name="Fira Sans Light" fo:font-style="italic" fo:font-weight="bold" style:font-name-asian="Fira Sans Light" style:font-style-asian="italic" style:font-weight-asian="bold" style:font-name-complex="Fira Sans Light" style:font-style-complex="italic" style:font-weight-complex="bold"/>
    </style:style>
    <style:style style:name="T14" style:family="text">
      <style:text-properties style:text-position="0% 100%" style:font-name="Fira Sans Light" fo:font-style="italic" fo:font-weight="bold" style:font-name-asian="Fira Sans Light" style:font-style-asian="italic" style:font-weight-asian="bold" style:font-name-complex="Fira Sans Light" style:font-style-complex="italic" style:font-weight-complex="bold"/>
    </style:style>
    <style:style style:name="T15" style:family="text">
      <style:text-properties style:text-position="0% 100%" style:font-name="Fira Sans Light" fo:font-style="italic" fo:font-weight="normal" style:font-name-asian="Fira Sans Light" style:font-style-asian="italic" style:font-weight-asian="normal" style:font-name-complex="Fira Sans Light" style:font-style-complex="italic" style:font-weight-complex="normal"/>
    </style:style>
    <style:style style:name="T16" style:family="text">
      <style:text-properties style:text-position="0% 100%" style:font-name="Fira Sans Light" fo:font-style="normal" fo:font-weight="normal" style:font-name-asian="Fira Sans Light" style:font-style-asian="normal" style:font-weight-asian="normal" style:font-name-complex="Fira Sans Light" style:font-style-complex="normal" style:font-weight-complex="normal"/>
    </style:style>
    <style:style style:name="T17" style:family="text">
      <style:text-properties fo:color="#2a6099" loext:opacity="100%" style:font-name="Liberation Serif" fo:font-size="11pt" fo:font-weight="bold" style:font-size-asian="10.5pt" style:font-weight-asian="bold" style:font-size-complex="11pt" style:font-weight-complex="bold"/>
    </style:style>
    <style:style style:name="T18" style:family="text">
      <style:text-properties fo:color="#2a6099" loext:opacity="100%" style:font-name="Liberation Serif" fo:font-size="11pt" fo:font-weight="normal" style:font-size-asian="10.5pt" style:font-weight-asian="normal" style:font-size-complex="11pt" style:font-weight-complex="normal"/>
    </style:style>
    <style:style style:name="T19" style:family="text">
      <style:text-properties style:text-position="33% 58%" fo:font-weight="bold" style:font-weight-asian="bold" style:font-weight-complex="bold"/>
    </style:style>
    <style:style style:name="T20" style:family="text">
      <style:text-properties style:text-position="0% 100%"/>
    </style:style>
    <style:style style:name="T21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1" fo:font-size="22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1" fo:font-size="22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2pt" fo:font-style="italic" fo:text-shadow="none" style:text-underline-style="none" fo:font-weight="normal" style:letter-kerning="true" style:font-name-asian="Fira Sans Light" style:font-size-asian="24pt" style:font-style-asian="italic" style:font-weight-asian="normal" style:font-name-complex="Fira Sans Light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2pt" fo:font-style="normal" fo:text-shadow="none" style:text-underline-style="none" fo:font-weight="normal" style:letter-kerning="true" style:font-name-asian="Fira Sans Light" style:font-size-asian="24pt" style:font-style-asian="normal" style:font-weight-asian="normal" style:font-name-complex="Fira Sans Light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3333" loext:opacity="100%" style:text-outline="false" style:text-line-through-style="none" style:text-line-through-type="none" style:text-position="33% 58%" style:font-name="Fira Sans Light" fo:font-size="22pt" fo:font-style="italic" fo:text-shadow="none" style:text-underline-style="none" fo:font-weight="normal" style:letter-kerning="true" style:font-name-asian="Fira Sans Light" style:font-size-asian="24pt" style:font-style-asian="italic" style:font-weight-asian="normal" style:font-name-complex="Fira Sans Light" style:font-size-complex="2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style:font-name="Fira Sans Light" fo:font-style="italic" fo:font-weight="normal" style:font-name-asian="Fira Sans Light" style:font-style-asian="italic" style:font-weight-asian="normal" style:font-name-complex="Fira Sans Light" style:font-style-complex="italic" style:font-weight-complex="normal"/>
    </style:style>
    <style:style style:name="T27" style:family="text">
      <style:text-properties style:text-position="33% 58%" style:font-name="Fira Sans Light" fo:font-style="italic" fo:font-weight="normal" style:font-name-asian="Fira Sans Light" style:font-style-asian="italic" style:font-weight-asian="normal" style:font-name-complex="Fira Sans Light" style:font-style-complex="italic" style:font-weight-complex="normal"/>
    </style:style>
    <style:style style:name="T28" style:family="text">
      <style:text-properties style:text-position="0% 100%" style:font-name="Fira Sans Light" fo:font-style="normal" fo:font-weight="bold" style:font-name-asian="Fira Sans Light" style:font-style-asian="normal" style:font-weight-asian="bold" style:font-name-complex="Fira Sans Light" style:font-style-complex="normal" style:font-weight-complex="bold"/>
    </style:style>
    <style:style style:name="T29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19pt" fo:font-style="normal" fo:text-shadow="none" style:text-underline-style="none" fo:font-weight="normal" style:letter-kerning="true" style:font-name-asian="Fira Sans Light" style:font-size-asian="19pt" style:font-style-asian="normal" style:font-weight-asian="normal" style:font-name-complex="Fira Sans Light" style:font-size-complex="1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super 58%"/>
    </style:style>
    <style:style style:name="T31" style:family="text">
      <style:text-properties fo:font-size="10.5pt" style:font-size-asian="10pt" style:font-size-complex="10.5pt"/>
    </style:style>
    <style:style style:name="T32" style:family="text">
      <style:text-properties style:text-position="33% 58%"/>
    </style:style>
    <style:style style:name="T33" style:family="text">
      <style:text-properties style:text-position="-33% 58%"/>
    </style:style>
    <style:style style:name="T34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Multi Agent Systems</text:span></text:p>
            <text:p text:style-name="P1"><text:span text:style-name="T2">- Lab 3 -</text:span></text:p>
            <text:p text:style-name="P1"><text:span text:style-name="T2">MDP Value and Policy Iteration Analysis</text:span></text:p>
          </draw:text-box>
        </draw:frame>
        <draw:frame draw:style-name="gr1" draw:text-style-name="P3" draw:layer="layout" svg:width="16.51cm" svg:height="1.597cm" svg:x="5.745cm" svg:y="12.819cm">
          <draw:text-box>
            <text:p><text:span text:style-name="T3">Slides adapted from Reinforcement Learning class by Vien Ngo, University of Stuttgart,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MDP</text:p>
          </draw:text-box>
        </draw:frame>
        <draw:frame draw:style-name="gr3" draw:text-style-name="P5" draw:layer="layout" svg:width="24.656cm" svg:height="11.547cm" svg:x="1.672cm" svg:y="2.931cm">
          <draw:image xlink:href="Pictures/1000000000000317000001A7D4C716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State Value Fun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The <text:span text:style-name="T4">value </text:span><text:span text:style-name="T5">(</text:span><text:span text:style-name="T6">expected discounted </text:span><text:span text:style-name="T5">return – for infinite horizon settings) of a policy </text:span><text:span text:style-name="T7">π</text:span><text:span text:style-name="T8"> </text:span><text:span text:style-name="T9">when started in state </text:span><text:span text:style-name="T8">s:</text:span></text:p>
            <text:p><text:span text:style-name="T8"/></text:p>
            <text:p><text:span text:style-name="T8"/></text:p>
            <text:p><text:span text:style-name="T9">where 0 &lt; </text:span><text:span text:style-name="T10">γ &lt; 1</text:span><text:span text:style-name="T9"> is the </text:span><text:span text:style-name="T8">discounting </text:span><text:span text:style-name="T9">factor</text:span></text:p>
            <text:p><text:span text:style-name="T9"/></text:p>
            <text:p><text:span text:style-name="T11">Optimality: policy </text:span><text:span text:style-name="T12">π</text:span><text:span text:style-name="T13">*</text:span><text:span text:style-name="T14"> </text:span><text:span text:style-name="T15">is optimal iff</text:span></text:p>
            <text:p><text:span text:style-name="T16"/></text:p>
            <text:p><text:span text:style-name="T8"/></text:p>
          </draw:text-box>
        </draw:frame>
        <draw:frame draw:style-name="gr3" draw:text-style-name="P5" draw:layer="layout" svg:width="17.102cm" svg:height="1.437cm" svg:x="5.449cm" svg:y="5.421cm">
          <draw:image xlink:href="Pictures/10000000000001BC000000278B98C9BD.png" xlink:type="simple" xlink:show="embed" xlink:actuate="onLoad" draw:mime-type="image/png">
            <text:p/>
          </draw:image>
        </draw:frame>
        <draw:frame draw:style-name="gr3" draw:text-style-name="P5" draw:layer="layout" svg:width="16.831cm" svg:height="1.472cm" svg:x="5.585cm" svg:y="10.974cm">
          <draw:image xlink:href="Pictures/10000000000002260000002F0C1A5F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Bellman Principle of Optimality</text:p>
          </draw:text-box>
        </draw:frame>
        <draw:frame draw:style-name="gr3" draw:text-style-name="P5" draw:layer="layout" svg:width="22.209cm" svg:height="4.386cm" svg:x="2.896cm" svg:y="6.282cm">
          <draw:image xlink:href="Pictures/1000000000000225000000707C8D7D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Value Iteration</text:p>
          </draw:text-box>
        </draw:frame>
        <draw:frame draw:style-name="gr3" draw:text-style-name="P5" draw:layer="layout" svg:width="20.731cm" svg:height="9.777cm" svg:x="3.635cm" svg:y="3.431cm">
          <draw:image xlink:href="Pictures/100000000000029000000177962B636B.png" xlink:type="simple" xlink:show="embed" xlink:actuate="onLoad" draw:mime-type="image/png">
            <text:p/>
          </draw:image>
        </draw:frame>
        <draw:custom-shape draw:style-name="gr4" draw:text-style-name="P6" draw:layer="layout" svg:width="2.31cm" svg:height="0.293cm" svg:x="24.444cm" svg:y="8.5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4.572cm" svg:height="1.979cm" svg:x="24.069cm" svg:y="9.033cm">
          <draw:text-box>
            <text:p><text:span text:style-name="T17">Every</text:span><text:span text:style-name="T18"> update to an </text:span><text:span text:style-name="T17">individual state </text:span></text:p>
            <text:p><text:span text:style-name="T18">counts as one ite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Policy Iteration</text:p>
          </draw:text-box>
        </draw:frame>
        <draw:frame presentation:style-name="pr4" draw:layer="layout" svg:width="25.199cm" svg:height="10.602cm" svg:x="1.4cm" svg:y="3.685cm" presentation:class="outline" presentation:user-transformed="true">
          <draw:text-box>
            <text:p><text:span text:style-name="T4">Value Iteration</text:span> computes <text:span text:style-name="T4">V</text:span><text:span text:style-name="T19">*</text:span><text:span text:style-name="T20"> directly</text:span></text:p>
            <text:p><text:span text:style-name="T21">To </text:span><text:span text:style-name="T22">evaluate</text:span><text:span text:style-name="T21"> a given policy </text:span><text:span text:style-name="T23">π, </text:span><text:span text:style-name="T24">one needs to compute V</text:span><text:span text:style-name="T25">π</text:span><text:span text:style-name="T23">, </text:span><text:span text:style-name="T24">that is iterate using </text:span><text:span text:style-name="T15">π </text:span><text:span text:style-name="T16">instead of </text:span><text:span text:style-name="T15">max</text:span><text:span text:style-name="T26">a</text:span></text:p>
            <text:p><text:span text:style-name="T27"/></text:p>
            <text:p><text:span text:style-name="T27"/></text:p>
            <text:p><text:span text:style-name="T16">Optimal policy can then be computed in iterative way</text:span></text:p>
            <text:p><text:span text:style-name="T28"/></text:p>
            <text:p><text:span text:style-name="T28">Policy Iteration</text:span></text:p>
            <text:list text:style-name="L3">
              <text:list-item>
                <text:p><text:span text:style-name="T24">Initialise </text:span><text:span text:style-name="T15">π</text:span><text:span text:style-name="T26">0</text:span><text:span text:style-name="T15"> </text:span><text:span text:style-name="T16">in a given way (e.g. randomly)</text:span></text:p>
              </text:list-item>
              <text:list-item>
                <text:p><text:span text:style-name="T16">Iterat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29">Policy Evaluation: compute compute</text:span></text:p>
                      </text:list-item>
                      <text:list-item>
                        <text:p><text:span text:style-name="T29">Policy Improvement: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6.813cm" svg:height="1.461cm" svg:x="5.594cm" svg:y="6.667cm">
          <draw:image xlink:href="Pictures/10000000000001F500000032A991EB69.png" xlink:type="simple" xlink:show="embed" xlink:actuate="onLoad" draw:mime-type="image/png">
            <text:p/>
          </draw:image>
        </draw:frame>
        <draw:frame draw:style-name="gr6" draw:text-style-name="P8" draw:layer="layout" svg:width="1.131cm" svg:height="0.584cm" svg:x="14.109cm" svg:y="12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8" draw:layer="layout" svg:width="1.999cm" svg:height="0.749cm" svg:x="11.584cm" svg:y="7.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8" draw:layer="layout" svg:width="14.209cm" svg:height="1.071cm" svg:x="9.31cm" svg:y="13.5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6" draw:layer="layout" svg:width="2.31cm" svg:height="0.293cm" svg:x="22.666cm" svg:y="6.8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4.572cm" svg:height="1.979cm" svg:x="22.098cm" svg:y="7.239cm">
          <draw:text-box>
            <text:p><text:span text:style-name="T17">Every</text:span><text:span text:style-name="T18"> update to an </text:span><text:span text:style-name="T17">individual state </text:span><text:span text:style-name="T18">counts as one ite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Value Iteration variants</text:p>
          </draw:text-box>
        </draw:frame>
        <draw:frame draw:style-name="gr3" draw:text-style-name="P5" draw:layer="layout" svg:width="21.272cm" svg:height="12.446cm" svg:x="3.364cm" svg:y="2.286cm">
          <draw:image xlink:href="Pictures/10000000000003240000024E19335A3B.png" xlink:type="simple" xlink:show="embed" xlink:actuate="onLoad" draw:mime-type="image/png">
            <text:p/>
          </draw:image>
        </draw:frame>
        <draw:custom-shape draw:style-name="gr4" draw:text-style-name="P6" draw:layer="layout" svg:width="2.31cm" svg:height="0.293cm" svg:x="18.034cm" svg:y="13.8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31cm" svg:height="0.293cm" svg:x="18.034cm" svg:y="8.57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5.08cm" svg:height="1.547cm" svg:x="20.32cm" svg:y="8.128cm">
          <draw:text-box>
            <text:p text:style-name="P9"><text:span text:style-name="T17">Every</text:span><text:span text:style-name="T18"> update to an </text:span><text:span text:style-name="T17">individual state </text:span><text:span text:style-name="T18">counts as one iteration</text:span></text:p>
          </draw:text-box>
        </draw:frame>
        <draw:frame draw:style-name="gr8" draw:text-style-name="P10" draw:layer="layout" svg:width="5.08cm" svg:height="1.547cm" svg:x="20.32cm" svg:y="13.085cm">
          <draw:text-box>
            <text:p text:style-name="P9"><text:span text:style-name="T17">Every</text:span><text:span text:style-name="T18"> update to an </text:span><text:span text:style-name="T17">individual state </text:span><text:span text:style-name="T18">counts as one ite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Value Iteration variants</text:p>
          </draw:text-box>
        </draw:frame>
        <draw:frame draw:style-name="gr3" draw:text-style-name="P5" draw:layer="layout" svg:width="23.718cm" svg:height="11.489cm" svg:x="1.936cm" svg:y="2.286cm">
          <draw:image xlink:href="Pictures/1000000000000325000001EC0C0B0B7A.png" xlink:type="simple" xlink:show="embed" xlink:actuate="onLoad" draw:mime-type="image/png">
            <text:p/>
          </draw:image>
        </draw:frame>
        <draw:g draw:style-name="gr9">
          <draw:custom-shape draw:style-name="gr4" draw:text-style-name="P6" draw:layer="layout" svg:width="2.31cm" svg:height="0.293cm" svg:x="24.36cm" svg:y="10.65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0" draw:text-style-name="P10" draw:layer="layout" svg:width="5.08cm" svg:height="1.547cm" svg:x="23.876cm" svg:y="8.89cm">
          <draw:text-box>
            <text:p text:style-name="P9"><text:span text:style-name="T17">Every</text:span><text:span text:style-name="T18"> update to an </text:span><text:span text:style-name="T17">individual state </text:span><text:span text:style-name="T18">counts </text:span></text:p>
            <text:p text:style-name="P9"><text:span text:style-name="T18">as one ite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OpenAI Gym Test Environments</text:p>
          </draw:text-box>
        </draw:frame>
        <draw:frame presentation:style-name="pr4" draw:layer="layout" svg:width="25.199cm" svg:height="9.642cm" svg:x="1.4cm" svg:y="2.55cm" presentation:class="outline" presentation:user-transformed="true">
          <draw:text-box>
            <text:list text:style-name="L2">
              <text:list-item>
                <text:p>Two test MDP environments based on <text:a xlink:href="https://github.com/openai/gym/" xlink:type="simple">OpenAI Gym</text:a><text:span text:style-name="T30">1</text:span>:</text:p>
                <text:list>
                  <text:list-item>
                    <text:p><text:a xlink:href="https://github.com/openai/gym/blob/master/gym/envs/toy_text/taxi.py" xlink:type="simple">Taxi-v3</text:a><text:span text:style-name="T30">2</text:span></text:p>
                    <text:list>
                      <text:list-item>
                        <text:p>4 locations</text:p>
                      </text:list-item>
                      <text:list-item>
                        <text:p>Pickup passenger at one location and drop him off at another</text:p>
                      </text:list-item>
                      <text:list-item>
                        <text:p>6 actions: move NORTH, SOUTH, EAST, WEST + PICK_UP + DROP_OFF</text:p>
                      </text:list-item>
                      <text:list-item>
                        <text:p>Rewards: +20 for successful drop-off, -1 per movement, -10 for illegal pick-up or drop-off</text:p>
                      </text:list-item>
                    </text:list>
                  </text:list-item>
                  <text:list-item>
                    <text:p><text:a xlink:href="https://github.com/openai/gym/blob/master/gym/envs/toy_text/frozen_lake.py" xlink:type="simple">FrozenLake-v1 (8x8)</text:a><text:span text:style-name="T30">3</text:span></text:p>
                    <text:list>
                      <text:list-item>
                        <text:p>Agent controls movement over a grid</text:p>
                      </text:list-item>
                      <text:list-item>
                        <text:p>Some tiles walkable, some lead agent to fall into water; agent has a start and goal tile</text:p>
                      </text:list-item>
                      <text:list-item>
                        <text:p>Movement of agent with uncertainty (due to slippery ice)</text:p>
                      </text:list-item>
                      <text:list-item>
                        <text:p>Rewards: +1 if agent finds correct path, 0 otherwis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1" draw:text-style-name="P3" draw:layer="layout" svg:width="23.876cm" svg:height="1.751cm" svg:x="1.778cm" svg:y="12.954cm">
          <draw:text-box>
            <text:p><text:span text:style-name="T31">1. Requires installing in a Python environment using python setup.py install</text:span><text:span text:style-name="T31"><text:line-break/></text:span><text:span text:style-name="T31">2. Instantiate using env = gym.make(“Taxi-v3”)</text:span></text:p>
            <text:p><text:span text:style-name="T31">3. Instantiate using env = gym.make("FrozenLake-v1", map_name="8x8", is_slippery=Tru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OpenAI Gym Test Environments</text:p>
          </draw:text-box>
        </draw:frame>
        <draw:frame presentation:style-name="pr4" draw:layer="layout" svg:width="25.199cm" svg:height="9.642cm" svg:x="1.4cm" svg:y="3.556cm" presentation:class="outline" presentation:user-transformed="true">
          <draw:text-box>
            <text:list text:style-name="L2">
              <text:list-item>
                <text:p>For Value / Policy Iteration we do not need to <text:span text:style-name="T4">run the game; </text:span><text:span text:style-name="T5">we only need its </text:span><text:span text:style-name="T6">properties</text:span></text:p>
              </text:list-item>
              <text:list-item>
                <text:p>For an instantiated environment: e.g. env = gym.make(“Taxi-v3”)</text:p>
                <text:list>
                  <text:list-item>
                    <text:p>Set of states: <text:span text:style-name="T4">env.observation_space </text:span>→ a Discrete(n) (i.e. a range of discrete states numbered 0 to n-1)</text:p>
                  </text:list-item>
                  <text:list-item>
                    <text:p>Set of actions: <text:span text:style-name="T4">env.action_space</text:span> → a Discrete(m) (i.e. a range of discrete actions numbered 0 to m-1)</text:p>
                  </text:list-item>
                  <text:list-item>
                    <text:p>Transition Probabilities: <text:span text:style-name="T4">env.P[state_idx][action_idx]</text:span> = (<text:span text:style-name="T4">prob</text:span>, <text:span text:style-name="T4">new_state</text:span>, <text:span text:style-name="T4">reward</text:span>, termin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1.922cm" svg:x="0cm" svg:y="0cm" presentation:class="title">
          <draw:text-box>
            <text:p>Tasks</text:p>
          </draw:text-box>
        </draw:frame>
        <draw:frame presentation:style-name="pr4" draw:layer="layout" svg:width="25.199cm" svg:height="11.366cm" svg:x="1.4cm" svg:y="2.54cm" presentation:class="outline" presentation:user-transformed="true">
          <draw:text-box>
            <text:list text:style-name="L2">
              <text:list-item>
                <text:p>For each game consider the following values for convergence criteria</text:p>
                <text:list>
                  <text:list-item>
                    <text:p>max_iterations: 5*10^5</text:p>
                  </text:list-item>
                  <text:list-item>
                    <text:p>epsilon_threshold: 10^-6</text:p>
                  </text:list-item>
                  <text:list-item>
                    <text:p>Discount factor: 0.9</text:p>
                  </text:list-item>
                </text:list>
              </text:list-item>
              <text:list-item>
                <text:p><text:span text:style-name="T4">Step 1</text:span>: compute <text:span text:style-name="T4">V*</text:span> using the <text:span text:style-name="T4">standard Value Iteration Algorithm</text:span></text:p>
              </text:list-item>
              <text:list-item>
                <text:p><text:span text:style-name="T4">Step 2: </text:span><text:span text:style-name="T5">Run the two variants of Value Iteration </text:span><text:span text:style-name="T4">(Gauss-Seidel VI, Prioritized Sweeping VI) </text:span><text:span text:style-name="T5">and compute the </text:span><text:span text:style-name="T4">number of iterations </text:span><text:span text:style-name="T5">until convergence to </text:span><text:span text:style-name="T4">V*. ATTENTION: </text:span><text:span text:style-name="T5">pass </text:span><text:span text:style-name="T4">V* </text:span><text:span text:style-name="T5">as a parameter to Gauss-Seidel VI and Prioritized-Sweeping VI</text:span></text:p>
              </text:list-item>
              <text:list-item>
                <text:p><text:span text:style-name="T4">Step 3: </text:span>Run 5 instantiations (random policy init each time) for <text:span text:style-name="T4">Policy Iteration </text:span>for each game: compute the <text:span text:style-name="T4">average of number of iterations </text:span><text:span text:style-name="T5">until convergence. </text:span><text:span text:style-name="T4">ATTENTION: </text:span><text:span text:style-name="T5">pass V* as a parameter to Policy Iteration</text:span></text:p>
              </text:list-item>
              <text:list-item>
                <text:p><text:span text:style-name="T4">Plot convergence graph</text:span></text:p>
                <text:list>
                  <text:list-item>
                    <text:p>X axis: number of iterations <text:span text:style-name="T4">(NOTE! </text:span><text:span text:style-name="T5">An </text:span><text:span text:style-name="T4">iteration</text:span><text:span text:style-name="T5"> is considered</text:span><text:span text:style-name="T4"> an update to a state </text:span><text:span text:style-name="T5">in the value function</text:span><text:span text:style-name="T4">, i.e. an update to V(s))</text:span></text:p>
                  </text:list-item>
                  <text:list-item>
                    <text:p>Y axis: ||V – V<text:span text:style-name="T32">*</text:span><text:span text:style-name="T20">||</text:span><text:span text:style-name="T33">2</text:span></text:p>
                  </text:list-item>
                </text:list>
              </text:list-item>
              <text:list-item>
                <text:p><text:span text:style-name="T34">Analyze convergence speed propert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Sans" svg:font-family="'Fira Sans'" style:font-adornments="ExtraLight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6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1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299cm" fo:text-indent="0cm"/>
      <style:text-properties fo:font-size="15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224cm" fo:text-indent="0cm"/>
      <style:text-properties fo:font-size="14.1999998092651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15cm" fo:text-indent="0cm"/>
      <style:text-properties fo:font-size="12.8000001907349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074cm" fo:text-indent="0cm"/>
      <style:text-properties fo:font-size="11.1999998092651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" fo:font-family="'Fira Sans'" style:font-style-name="ExtraLight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6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1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299cm" fo:text-indent="0cm"/>
      <style:text-properties fo:font-size="15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224cm" fo:text-indent="0cm"/>
      <style:text-properties fo:font-size="14.1999998092651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15cm" fo:text-indent="0cm"/>
      <style:text-properties fo:font-size="12.8000001907349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074cm" fo:text-indent="0cm"/>
      <style:text-properties fo:font-size="11.1999998092651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074cm" fo:text-indent="0cm"/>
      <style:text-properties fo:font-size="10.5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" fo:font-family="'Fira Sans'" style:font-style-name="ExtraLight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 loext:decorative="false"/>
    </style:style>
    <style:style style:name="Mgr6" style:family="graphic" style:parent-style-name="standard">
      <style:graphic-properties draw:stroke="none" svg:stroke-color="#ff6600" draw:fill-color="#003333" loext:decorative="false"/>
    </style:style>
    <style:style style:name="Mgr7" style:family="graphic" style:parent-style-name="standard">
      <style:graphic-properties draw:stroke="none" draw:fill-color="#003333" draw:textarea-vertical-align="middle" draw:auto-grow-height="false" fo:min-height="0.425cm" fo:min-width="27.5cm" loext:decorative="false"/>
    </style:style>
    <style:style style:name="Mgr8" style:family="graphic" style:parent-style-name="standard">
      <style:graphic-properties draw:stroke="none" draw:fill="none" draw:fill-color="#ffffff" fo:min-height="8.884cm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loext:opacity="100%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loext:opacity="100%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color="#ffffff" loext:opacity="100%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loext:opacity="100%" style:font-name="Fira Sans Light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loext:opacity="100%" style:font-name="Fira Sans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loext:opacity="100%" style:font-name="Fira Sans Light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15.074cm" svg:x2="28cm" svg:y2="15.074cm">
        <text:p/>
      </draw:line>
      <draw:line draw:style-name="Mgr5" draw:text-style-name="MP20" draw:layer="backgroundobjects" svg:x1="0cm" svg:y1="1.922cm" svg:x2="28cm" svg:y2="1.922cm">
        <text:p/>
      </draw:line>
      <draw:rect draw:style-name="Mgr6" draw:text-style-name="MP21" draw:layer="backgroundobjects" svg:width="28cm" svg:height="1.922cm" svg:x="0cm" svg:y="0cm">
        <text:p/>
      </draw:rect>
      <draw:custom-shape draw:style-name="Mgr7" draw:text-style-name="MP22" draw:layer="backgroundobjects" svg:width="28cm" svg:height="0.675cm" svg:x="0cm" svg:y="15.07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1.922cm" svg:x="0cm" svg:y="0cm" presentation:class="title" presentation:placeholder="true">
        <draw:text-box/>
      </draw:frame>
      <draw:frame draw:style-name="Mgr8" draw:text-style-name="MP23" draw:layer="backgroundobjects" svg:width="25.199cm" svg:height="9.134cm" svg:x="1.4cm" svg:y="3.685cm">
        <draw:text-box>
          <text:p/>
        </draw:text-box>
      </draw:frame>
      <draw:frame presentation:style-name="Mpr16" draw:text-style-name="MP25" draw:layer="backgroundobjects" svg:width="21.7cm" svg:height="0.427cm" svg:x="0.6cm" svg:y="15.173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427cm" svg:x="23.8cm" svg:y="15.173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1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15.074cm" svg:x2="28cm" svg:y2="15.074cm">
        <text:p/>
      </draw:line>
      <draw:line draw:style-name="Mgr5" draw:text-style-name="MP20" draw:layer="backgroundobjects" svg:x1="0cm" svg:y1="1.922cm" svg:x2="28cm" svg:y2="1.922cm">
        <text:p/>
      </draw:line>
      <draw:rect draw:style-name="Mgr6" draw:text-style-name="MP21" draw:layer="backgroundobjects" svg:width="28cm" svg:height="1.922cm" svg:x="0cm" svg:y="0cm">
        <text:p/>
      </draw:rect>
      <draw:custom-shape draw:style-name="Mgr7" draw:text-style-name="MP22" draw:layer="backgroundobjects" svg:width="28cm" svg:height="0.675cm" svg:x="0cm" svg:y="15.07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1.922cm" svg:x="0cm" svg:y="0cm" presentation:class="title" presentation:placeholder="true">
        <draw:text-box/>
      </draw:frame>
      <draw:frame draw:style-name="Mgr8" draw:text-style-name="MP23" draw:layer="backgroundobjects" svg:width="25.199cm" svg:height="9.134cm" svg:x="1.4cm" svg:y="3.685cm">
        <draw:text-box>
          <text:p/>
        </draw:text-box>
      </draw:frame>
      <draw:frame presentation:style-name="Mpr19" draw:text-style-name="MP25" draw:layer="backgroundobjects" svg:width="21.7cm" svg:height="0.427cm" svg:x="0.6cm" svg:y="15.173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427cm" svg:x="23.8cm" svg:y="15.173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1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9T14:56:05.297435605</meta:creation-date>
    <meta:editing-duration>P1DT4H59M58S</meta:editing-duration>
    <meta:editing-cycles>59</meta:editing-cycles>
    <meta:generator>LibreOffice/24.2.7.2$Linux_X86_64 LibreOffice_project/420$Build-2</meta:generator>
    <dc:title>Midnightblue</dc:title>
    <meta:initial-creator>Alexandru Sorici</meta:initial-creator>
    <dc:date>2026-03-18T17:45:36.616564614</dc:date>
    <dc:creator>Alexandru Sorici</dc:creator>
    <meta:document-statistic meta:object-count="140"/>
  </office:meta>
</office:document-meta>
</file>

<file path=Object 1/content.xml><?xml version="1.0" encoding="utf-8"?>
<math xmlns="http://www.w3.org/1998/Math/MathML" display="block">
  <semantics>
    <msup>
      <mi>V</mi>
      <msub>
        <mi>π</mi>
        <mi>k</mi>
      </msub>
    </msup>
    <annotation encoding="StarMath 5.0">V^{ %pi_k 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>
        <mi>π</mi>
        <mrow>
          <mi>k</mi>
          <mo stretchy="false">+</mo>
          <mn>1</mn>
        </mrow>
      </msub>
      <mrow>
        <mrow>
          <mo fence="true" stretchy="false">(</mo>
          <mrow>
            <mi>s</mi>
          </mrow>
          <mo fence="true" stretchy="false">)</mo>
        </mrow>
        <mo stretchy="false">=</mo>
        <munder>
          <mi mathvariant="italic">argmax</mi>
          <mrow>
            <mi>a</mi>
            <mo stretchy="false">∈</mo>
            <mi>A</mi>
          </mrow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a</mi>
                    <mi>,</mi>
                    <mi>s</mi>
                  </mrow>
                </mrow>
                <mo fence="true" stretchy="false">)</mo>
              </mrow>
              <mo stretchy="false">+</mo>
              <mi>γ</mi>
            </mrow>
            <mrow>
              <munder>
                <mo stretchy="false">∑</mo>
                <mrow>
                  <mi>s</mi>
                  <mi>'</mi>
                </mrow>
              </munder>
              <mrow>
                <mi>P</mi>
                <mrow>
                  <mo fence="true" stretchy="false">(</mo>
                  <mrow>
                    <mrow>
                      <mi>s</mi>
                      <mrow>
                        <mi>'</mi>
                        <mo stretchy="false">∣</mo>
                        <mi>a</mi>
                      </mrow>
                      <mi>,</mi>
                      <mi>s</mi>
                    </mrow>
                  </mrow>
                  <mo fence="true" stretchy="false">)</mo>
                </mrow>
                <msup>
                  <mi>V</mi>
                  <msub>
                    <mi>π</mi>
                    <mi>k</mi>
                  </msub>
                </m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</mrow>
        <mo fence="true" stretchy="false">]</mo>
      </mrow>
    </mrow>
    <annotation encoding="StarMath 5.0">%pi_{k+1}(s) = argmax csub {a in A} [R(a,s) + %gamma sum from {s'} {P(s' divides a, s) V^{%pi_k}(s)}] </annotation>
  </semantics>
</math>
</file>